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17a82"/>
    </style:style>
    <style:style style:name="P2" style:family="paragraph" style:parent-style-name="Standard">
      <style:text-properties officeooo:rsid="00217a82" officeooo:paragraph-rsid="00217a82"/>
    </style:style>
    <style:style style:name="T1" style:family="text">
      <style:text-properties officeooo:rsid="00217a82"/>
    </style:style>
    <style:style style:name="T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span text:style-name="T2">Docker Container Networking Issue</text:span></text:p>
      <text:p text:style-name="P2"/>
      <text:p text:style-name="P2">Problem:</text:p>
      <text:p text:style-name="P2">While containerizing KavachOps using Docker Compose, the backend container was unable to connect with the PostgreSQL database container. The application failed during startup because database connectivity was not being established successfully.</text:p>
      <text:p text:style-name="P2"/>
      <text:p text:style-name="P2">Root Cause:</text:p>
      <text:p text:style-name="P2">Initially, the database connection string used:</text:p>
      <text:p text:style-name="P2">localhost</text:p>
      <text:p text:style-name="P2"/>
      <text:p text:style-name="P2">This worked in local development because PostgreSQL was installed directly on the local machine.</text:p>
      <text:p text:style-name="P2"/>
      <text:p text:style-name="P2">However, after moving to Docker architecture, each service ran inside its own isolated container:</text:p>
      <text:p text:style-name="P2">- frontend container</text:p>
      <text:p text:style-name="P2">- backend container</text:p>
      <text:p text:style-name="P2">- PostgreSQL container</text:p>
      <text:p text:style-name="P2"/>
      <text:p text:style-name="P2">Inside Docker, localhost refers to the current container itself, not the host machine or another container.</text:p>
      <text:p text:style-name="P2"/>
      <text:p text:style-name="P2">So when backend container tried:</text:p>
      <text:p text:style-name="P2">localhost:5432</text:p>
      <text:p text:style-name="P2"/>
      <text:p text:style-name="P2">it searched for PostgreSQL inside the backend container itself, where no database existed.</text:p>
      <text:p text:style-name="P2"/>
      <text:p text:style-name="P2">Solution:</text:p>
      <text:p text:style-name="P2">Docker Compose automatically creates an internal network where services communicate using service names.</text:p>
      <text:p text:style-name="P2"/>
      <text:p text:style-name="P2">The PostgreSQL service was defined as:</text:p>
      <text:p text:style-name="P2">db</text:p>
      <text:p text:style-name="P2"/>
      <text:p text:style-name="P2">So the database hostname was changed from:</text:p>
      <text:p text:style-name="P2">localhost</text:p>
      <text:p text:style-name="P2"/>
      <text:p text:style-name="P2">to:</text:p>
      <text:p text:style-name="P2">db</text:p>
      <text:p text:style-name="P2"/>
      <text:p text:style-name="P2">Updated DATABASE_URL:</text:p>
      <text:p text:style-name="P2">postgresql://kavachuser:securepassword@db:5432/kavachops</text:p>
      <text:p text:style-name="P2"/>
      <text:p text:style-name="P2">After this change, backend container successfully communicated with PostgreSQL container through Docker networking.</text:p>
      <text:p text:style-name="P2"/>
      <text:p text:style-name="P2">Technical Concepts Learned:</text:p>
      <text:p text:style-name="P2">- Docker networking</text:p>
      <text:p text:style-name="P2">- Service discovery</text:p>
      <text:p text:style-name="P2">- Container isolation</text:p>
      <text:p text:style-name="P2">- Multi-container architecture</text:p>
      <text:p text:style-name="P2">- Cloud-native communication</text:p>
      <text:p text:style-name="P2">- Environment variable management</text:p>
      <text:p text:style-name="P2"><text:soft-page-break/></text:p>
      <text:p text:style-name="P2">Enterprise Relevance:</text:p>
      <text:p text:style-name="P2">This is a very important real-world DevOps concept because modern enterprise applications heavily rely on containerized microservices communicating through internal networking in Docker and Kubernetes environments.</text:p>
      <text:p text:style-name="P2"/>
      <text:p text:style-name="P2">2. <text:span text:style-name="T2">Authentication Route Registration Issue</text:span></text:p>
      <text:p text:style-name="P2"/>
      <text:p text:style-name="P2">Problem:</text:p>
      <text:p text:style-name="P2">Frontend login functionality continuously failed even though authentication logic and API code were already written correctly inside auth.py.</text:p>
      <text:p text:style-name="P2"/>
      <text:p text:style-name="P2">Swagger testing sometimes worked inconsistently, but frontend requests returned route errors and login functionality was inaccessible.</text:p>
      <text:p text:style-name="P2"/>
      <text:p text:style-name="P2">Root Cause:</text:p>
      <text:p text:style-name="P2">FastAPI uses modular router architecture.</text:p>
      <text:p text:style-name="P2"/>
      <text:p text:style-name="P2">Although authentication routes like:</text:p>
      <text:p text:style-name="P2">/login</text:p>
      <text:p text:style-name="P2">/register</text:p>
      <text:p text:style-name="P2"/>
      <text:p text:style-name="P2">were properly defined inside auth.py, they were never attached to the main FastAPI application.</text:p>
      <text:p text:style-name="P2"/>
      <text:p text:style-name="P2">The following line was missing inside main.py:</text:p>
      <text:p text:style-name="P2">app.include_router(auth.router)</text:p>
      <text:p text:style-name="P2"/>
      <text:p text:style-name="P2">Without router inclusion, FastAPI does not expose those API endpoints publicly.</text:p>
      <text:p text:style-name="P2"/>
      <text:p text:style-name="P2">This meant:</text:p>
      <text:p text:style-name="P2">- authentication logic existed</text:p>
      <text:p text:style-name="P2">- API functions existed</text:p>
      <text:p text:style-name="P2">- but routes were never registered inside actual application runtime</text:p>
      <text:p text:style-name="P2"/>
      <text:p text:style-name="P2">As a result:</text:p>
      <text:p text:style-name="P2">frontend could not access login APIs.</text:p>
      <text:p text:style-name="P2"/>
      <text:p text:style-name="P2">Solution:</text:p>
      <text:p text:style-name="P2">Imported authentication router into main.py and registered it properly:</text:p>
      <text:p text:style-name="P2"/>
      <text:p text:style-name="P2">from app.api import auth</text:p>
      <text:p text:style-name="P2"/>
      <text:p text:style-name="P2">app.include_router(auth.router)</text:p>
      <text:p text:style-name="P2"/>
      <text:p text:style-name="P2">Once router registration was added:</text:p>
      <text:p text:style-name="P2">- login endpoint became accessible</text:p>
      <text:p text:style-name="P2">- register endpoint became accessible</text:p>
      <text:p text:style-name="P2">- frontend authentication started functioning properly</text:p>
      <text:p text:style-name="P2"/>
      <text:p text:style-name="P2">Technical Concepts Learned:</text:p>
      <text:p text:style-name="P2">- FastAPI modular architecture</text:p>
      <text:p text:style-name="P2">- Router registration</text:p>
      <text:p text:style-name="P2"><text:soft-page-break/>- API exposure flow</text:p>
      <text:p text:style-name="P2">- Backend service architecture</text:p>
      <text:p text:style-name="P2">- REST API organization</text:p>
      <text:p text:style-name="P2">- Modular backend design</text:p>
      <text:p text:style-name="P2"/>
      <text:p text:style-name="P2">Enterprise Relevance:</text:p>
      <text:p text:style-name="P2">Large enterprise applications never keep all APIs inside one file.</text:p>
      <text:p text:style-name="P2">They use modular routing architecture where:</text:p>
      <text:p text:style-name="P2">- authentication routes</text:p>
      <text:p text:style-name="P2">- user routes</text:p>
      <text:p text:style-name="P2">- admin routes</text:p>
      <text:p text:style-name="P2">- monitoring routes</text:p>
      <text:p text:style-name="P2"/>
      <text:p text:style-name="P2">are separated into different modules and registered centrally.</text:p>
      <text:p text:style-name="P2"/>
      <text:p text:style-name="P2">This debugging experience demonstrates understanding of scalable backend architecture patterns used in production systems.</text:p>
      <text:p text:style-name="P2"/>
      <text:p text:style-name="P2">3. <text:span text:style-name="T2">CORS Issue Between Frontend &amp; Backend</text:span></text:p>
      <text:p text:style-name="P2"/>
      <text:p text:style-name="P2">Problem:</text:p>
      <text:p text:style-name="P2">Frontend React application was unable to communicate with FastAPI backend APIs even though backend server was running correctly.</text:p>
      <text:p text:style-name="P2"/>
      <text:p text:style-name="P2">Browser blocked requests automatically.</text:p>
      <text:p text:style-name="P2"/>
      <text:p text:style-name="P2">Frontend login and API communication failed.</text:p>
      <text:p text:style-name="P2"/>
      <text:p text:style-name="P2">Root Cause:</text:p>
      <text:p text:style-name="P2">Frontend and backend were running on different origins:</text:p>
      <text:p text:style-name="P2"/>
      <text:p text:style-name="P2">Frontend:</text:p>
      <text:p text:style-name="P2">http://localhost:3000</text:p>
      <text:p text:style-name="P2"/>
      <text:p text:style-name="P2">Backend:</text:p>
      <text:p text:style-name="P2">http://localhost:8000</text:p>
      <text:p text:style-name="P2"/>
      <text:p text:style-name="P2">According to browser security policies, requests between different origins are restricted by default to prevent malicious cross-site attacks.</text:p>
      <text:p text:style-name="P2"/>
      <text:p text:style-name="P2">This security mechanism is called:</text:p>
      <text:p text:style-name="P2">CORS (Cross-Origin Resource Sharing)</text:p>
      <text:p text:style-name="P2"/>
      <text:p text:style-name="P2">Since FastAPI backend was not configured to allow frontend origin, browser blocked requests before they even reached backend APIs.</text:p>
      <text:p text:style-name="P2"/>
      <text:p text:style-name="P2">Solution:</text:p>
      <text:p text:style-name="P2">Implemented CORSMiddleware in FastAPI application.</text:p>
      <text:p text:style-name="P2"/>
      <text:p text:style-name="P2">Added:</text:p>
      <text:p text:style-name="P2"/>
      <text:p text:style-name="P2">from fastapi.middleware.cors import CORSMiddleware</text:p>
      <text:p text:style-name="P2"><text:soft-page-break/></text:p>
      <text:p text:style-name="P2">Configured middleware:</text:p>
      <text:p text:style-name="P2"/>
      <text:p text:style-name="P2">app.add_middleware(</text:p>
      <text:p text:style-name="P2"><text:s text:c="4"/>CORSMiddleware,</text:p>
      <text:p text:style-name="P2"><text:s text:c="4"/>allow_origins=["http://localhost:3000"],</text:p>
      <text:p text:style-name="P2"><text:s text:c="4"/>allow_credentials=True,</text:p>
      <text:p text:style-name="P2"><text:s text:c="4"/>allow_methods=["*"],</text:p>
      <text:p text:style-name="P2"><text:s text:c="4"/>allow_headers=["*"],</text:p>
      <text:p text:style-name="P2">)</text:p>
      <text:p text:style-name="P2"/>
      <text:p text:style-name="P2">This explicitly allowed frontend origin to communicate with backend APIs securely.</text:p>
      <text:p text:style-name="P2"/>
      <text:p text:style-name="P2">After enabling CORS:</text:p>
      <text:p text:style-name="P2">- frontend requests succeeded</text:p>
      <text:p text:style-name="P2">- login APIs worked</text:p>
      <text:p text:style-name="P2">- frontend-backend integration became functional</text:p>
      <text:p text:style-name="P2"/>
      <text:p text:style-name="P2">Technical Concepts Learned:</text:p>
      <text:p text:style-name="P2">- Browser security policies</text:p>
      <text:p text:style-name="P2">- Cross-Origin Resource Sharing (CORS)</text:p>
      <text:p text:style-name="P2">- Frontend-backend API communication</text:p>
      <text:p text:style-name="P2">- Middleware architecture</text:p>
      <text:p text:style-name="P2">- Secure API access control</text:p>
      <text:p text:style-name="P2"/>
      <text:p text:style-name="P2">Enterprise Relevance:</text:p>
      <text:p text:style-name="P2">CORS configuration is a very important real-world security concept used in:</text:p>
      <text:p text:style-name="P2">- enterprise web applications</text:p>
      <text:p text:style-name="P2">- SaaS platforms</text:p>
      <text:p text:style-name="P2">- cloud-native systems</text:p>
      <text:p text:style-name="P2">- frontend-backend architectures</text:p>
      <text:p text:style-name="P2"/>
      <text:p text:style-name="P2">Improper CORS configuration can either:</text:p>
      <text:p text:style-name="P2">- block legitimate requests</text:p>
      <text:p text:style-name="P2">OR</text:p>
      <text:p text:style-name="P2">- create security vulnerabilities.</text:p>
      <text:p text:style-name="P2"/>
      <text:p text:style-name="P2">Understanding and configuring CORS correctly is an important backend engineering skil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6T00:40:52.373258896</meta:creation-date>
    <meta:generator>LibreOffice/7.3.7.2$Linux_X86_64 LibreOffice_project/30$Build-2</meta:generator>
    <dc:date>2026-05-26T01:26:34.832431983</dc:date>
    <meta:editing-duration>PT35M32S</meta:editing-duration>
    <meta:editing-cycles>2</meta:editing-cycles>
    <meta:document-statistic meta:table-count="0" meta:image-count="0" meta:object-count="0" meta:page-count="4" meta:paragraph-count="127" meta:word-count="662" meta:character-count="5160" meta:non-whitespace-character-count="4605"/>
  </office:meta>
</office:document-meta>
</file>