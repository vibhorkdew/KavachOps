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weight="normal" style:font-weight-asian="normal" style:font-weight-complex="normal"/>
    </style:style>
    <style:style style:name="P2" style:family="paragraph" style:parent-style-name="Horizontal_20_Line">
      <style:text-properties fo:font-weight="normal" style:font-weight-asian="normal" style:font-weight-complex="normal"/>
    </style:style>
    <style:style style:name="P3" style:family="paragraph" style:parent-style-name="Preformatted_20_Text">
      <style:paragraph-properties fo:margin-top="0cm" fo:margin-bottom="0.499cm" style:contextual-spacing="false"/>
    </style:style>
    <style:style style:name="P4" style:family="paragraph" style:parent-style-name="Quotations">
      <style:text-properties fo:font-weight="normal" style:font-weight-asian="normal" style:font-weight-complex="normal"/>
    </style:style>
    <style:style style:name="P5" style:family="paragraph" style:parent-style-name="Standard">
      <style:text-properties fo:font-weight="bold" officeooo:rsid="00217a82" officeooo:paragraph-rsid="00217a82" style:font-weight-asian="bold" style:font-weight-complex="bold"/>
    </style:style>
    <style:style style:name="P6" style:family="paragraph" style:parent-style-name="Standard">
      <style:text-properties fo:font-weight="bold" officeooo:paragraph-rsid="00237e5e" style:font-weight-asian="bold" style:font-weight-complex="bold"/>
    </style:style>
    <style:style style:name="P7" style:family="paragraph" style:parent-style-name="Standard">
      <style:text-properties fo:font-weight="normal" officeooo:rsid="00217a82" officeooo:paragraph-rsid="00217a82" style:font-weight-asian="normal" style:font-weight-complex="normal"/>
    </style:style>
    <style:style style:name="P8" style:family="paragraph" style:parent-style-name="Standard">
      <style:text-properties fo:font-weight="normal" officeooo:rsid="00237e5e" officeooo:paragraph-rsid="00237e5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37e5e" style:font-weight-asian="bold" style:font-weight-complex="bold"/>
    </style:style>
    <style:style style:name="T3" style:family="text">
      <style:text-properties officeooo:rsid="00237e5e"/>
    </style:style>
    <style:style style:name="T4" style:family="text">
      <style:text-properties fo:font-weight="normal" style:font-weight-asian="normal" style:font-weight-complex="normal"/>
    </style:style>
    <style:style style:name="T5" style:family="text">
      <style:text-properties fo:font-size="16pt" style:font-size-asian="16pt" style:font-size-complex="16pt"/>
    </style:style>
    <style:style style:name="T6" style:family="text">
      <style:text-properties fo:font-size="16pt" officeooo:rsid="00237e5e"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officeooo:rsid="00237e5e" style:font-size-asian="16pt" style:font-weight-asian="bold" style:font-size-complex="16pt" style:font-weight-complex="bol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span text:style-name="T7">Docker Container Networking Issue</text:span></text:p>
      <text:p text:style-name="P7"/>
      <text:p text:style-name="P7">Problem:</text:p>
      <text:p text:style-name="P7">While containerizing KavachOps using Docker Compose, the backend container was unable to connect with the PostgreSQL database container. The application failed during startup because database connectivity was not being established successfully.</text:p>
      <text:p text:style-name="P7"/>
      <text:p text:style-name="P7">Root Cause:</text:p>
      <text:p text:style-name="P7">Initially, the database connection string used:</text:p>
      <text:p text:style-name="P7">localhost</text:p>
      <text:p text:style-name="P7"/>
      <text:p text:style-name="P7">This worked in local development because PostgreSQL was installed directly on the local machine.</text:p>
      <text:p text:style-name="P7"/>
      <text:p text:style-name="P7">However, after moving to Docker architecture, each service ran inside its own isolated container:</text:p>
      <text:p text:style-name="P7">- frontend container</text:p>
      <text:p text:style-name="P7">- backend container</text:p>
      <text:p text:style-name="P7">- PostgreSQL container</text:p>
      <text:p text:style-name="P7"/>
      <text:p text:style-name="P7">Inside Docker, localhost refers to the current container itself, not the host machine or another container.</text:p>
      <text:p text:style-name="P7"/>
      <text:p text:style-name="P7">So when backend container tried:</text:p>
      <text:p text:style-name="P7">localhost:5432</text:p>
      <text:p text:style-name="P7"/>
      <text:p text:style-name="P7">it searched for PostgreSQL inside the backend container itself, where no database existed.</text:p>
      <text:p text:style-name="P7"/>
      <text:p text:style-name="P7">Solution:</text:p>
      <text:p text:style-name="P7">Docker Compose automatically creates an internal network where services communicate using service names.</text:p>
      <text:p text:style-name="P7"/>
      <text:p text:style-name="P7">The PostgreSQL service was defined as:</text:p>
      <text:p text:style-name="P7">db</text:p>
      <text:p text:style-name="P7"/>
      <text:p text:style-name="P7">So the database hostname was changed from:</text:p>
      <text:p text:style-name="P7">localhost</text:p>
      <text:p text:style-name="P7"/>
      <text:p text:style-name="P7">to:</text:p>
      <text:p text:style-name="P7">db</text:p>
      <text:p text:style-name="P7"/>
      <text:p text:style-name="P7">Updated DATABASE_URL:</text:p>
      <text:p text:style-name="P7">postgresql://kavachuser:securepassword@db:5432/kavachops</text:p>
      <text:p text:style-name="P7"/>
      <text:p text:style-name="P7">After this change, backend container successfully communicated with PostgreSQL container through Docker networking.</text:p>
      <text:p text:style-name="P7"/>
      <text:p text:style-name="P7">Technical Concepts Learned:</text:p>
      <text:p text:style-name="P7">- Docker networking</text:p>
      <text:p text:style-name="P7">- Service discovery</text:p>
      <text:p text:style-name="P7">- Container isolation</text:p>
      <text:p text:style-name="P7">- Multi-container architecture</text:p>
      <text:p text:style-name="P7">- Cloud-native communication</text:p>
      <text:p text:style-name="P7">- Environment variable management</text:p>
      <text:p text:style-name="P7"><text:soft-page-break/></text:p>
      <text:p text:style-name="P7">Enterprise Relevance:</text:p>
      <text:p text:style-name="P7">This is a very important real-world DevOps concept because modern enterprise applications heavily rely on containerized microservices communicating through internal networking in Docker and Kubernetes environments.</text:p>
      <text:p text:style-name="P7"/>
      <text:p text:style-name="P7">2. <text:span text:style-name="T7">Authentication Route Registration Issue</text:span></text:p>
      <text:p text:style-name="P7"/>
      <text:p text:style-name="P7">Problem:</text:p>
      <text:p text:style-name="P7">Frontend login functionality continuously failed even though authentication logic and API code were already written correctly inside auth.py.</text:p>
      <text:p text:style-name="P7"/>
      <text:p text:style-name="P7">Swagger testing sometimes worked inconsistently, but frontend requests returned route errors and login functionality was inaccessible.</text:p>
      <text:p text:style-name="P7"/>
      <text:p text:style-name="P7">Root Cause:</text:p>
      <text:p text:style-name="P7">FastAPI uses modular router architecture.</text:p>
      <text:p text:style-name="P7"/>
      <text:p text:style-name="P7">Although authentication routes like:</text:p>
      <text:p text:style-name="P7">/login</text:p>
      <text:p text:style-name="P7">/register</text:p>
      <text:p text:style-name="P7"/>
      <text:p text:style-name="P7">were properly defined inside auth.py, they were never attached to the main FastAPI application.</text:p>
      <text:p text:style-name="P7"/>
      <text:p text:style-name="P7">The following line was missing inside main.py:</text:p>
      <text:p text:style-name="P7">app.include_router(auth.router)</text:p>
      <text:p text:style-name="P7"/>
      <text:p text:style-name="P7">Without router inclusion, FastAPI does not expose those API endpoints publicly.</text:p>
      <text:p text:style-name="P7"/>
      <text:p text:style-name="P7">This meant:</text:p>
      <text:p text:style-name="P7">- authentication logic existed</text:p>
      <text:p text:style-name="P7">- API functions existed</text:p>
      <text:p text:style-name="P7">- but routes were never registered inside actual application runtime</text:p>
      <text:p text:style-name="P7"/>
      <text:p text:style-name="P7">As a result:</text:p>
      <text:p text:style-name="P7">frontend could not access login APIs.</text:p>
      <text:p text:style-name="P7"/>
      <text:p text:style-name="P7">Solution:</text:p>
      <text:p text:style-name="P7">Imported authentication router into main.py and registered it properly:</text:p>
      <text:p text:style-name="P7"/>
      <text:p text:style-name="P7">from app.api import auth</text:p>
      <text:p text:style-name="P7"/>
      <text:p text:style-name="P7">app.include_router(auth.router)</text:p>
      <text:p text:style-name="P7"/>
      <text:p text:style-name="P7">Once router registration was added:</text:p>
      <text:p text:style-name="P7">- login endpoint became accessible</text:p>
      <text:p text:style-name="P7">- register endpoint became accessible</text:p>
      <text:p text:style-name="P7">- frontend authentication started functioning properly</text:p>
      <text:p text:style-name="P7"/>
      <text:p text:style-name="P7">Technical Concepts Learned:</text:p>
      <text:p text:style-name="P7">- FastAPI modular architecture</text:p>
      <text:p text:style-name="P7">- Router registration</text:p>
      <text:p text:style-name="P7"><text:soft-page-break/>- API exposure flow</text:p>
      <text:p text:style-name="P7">- Backend service architecture</text:p>
      <text:p text:style-name="P7">- REST API organization</text:p>
      <text:p text:style-name="P7">- Modular backend design</text:p>
      <text:p text:style-name="P7"/>
      <text:p text:style-name="P7">Enterprise Relevance:</text:p>
      <text:p text:style-name="P7">Large enterprise applications never keep all APIs inside one file.</text:p>
      <text:p text:style-name="P7">They use modular routing architecture where:</text:p>
      <text:p text:style-name="P7">- authentication routes</text:p>
      <text:p text:style-name="P7">- user routes</text:p>
      <text:p text:style-name="P7">- admin routes</text:p>
      <text:p text:style-name="P7">- monitoring routes</text:p>
      <text:p text:style-name="P7"/>
      <text:p text:style-name="P7">are separated into different modules and registered centrally.</text:p>
      <text:p text:style-name="P7"/>
      <text:p text:style-name="P7">This debugging experience demonstrates understanding of scalable backend architecture patterns used in production systems.</text:p>
      <text:p text:style-name="P7"/>
      <text:p text:style-name="P7">3. <text:span text:style-name="T7">CORS Issue Between Frontend &amp; Backend</text:span></text:p>
      <text:p text:style-name="P7"/>
      <text:p text:style-name="P7">Problem:</text:p>
      <text:p text:style-name="P7">Frontend React application was unable to communicate with FastAPI backend APIs even though backend server was running correctly.</text:p>
      <text:p text:style-name="P7"/>
      <text:p text:style-name="P7">Browser blocked requests automatically.</text:p>
      <text:p text:style-name="P7"/>
      <text:p text:style-name="P7">Frontend login and API communication failed.</text:p>
      <text:p text:style-name="P7"/>
      <text:p text:style-name="P7">Root Cause:</text:p>
      <text:p text:style-name="P7">Frontend and backend were running on different origins:</text:p>
      <text:p text:style-name="P7"/>
      <text:p text:style-name="P7">Frontend:</text:p>
      <text:p text:style-name="P7">http://localhost:3000</text:p>
      <text:p text:style-name="P7"/>
      <text:p text:style-name="P7">Backend:</text:p>
      <text:p text:style-name="P7">http://localhost:8000</text:p>
      <text:p text:style-name="P7"/>
      <text:p text:style-name="P7">According to browser security policies, requests between different origins are restricted by default to prevent malicious cross-site attacks.</text:p>
      <text:p text:style-name="P7"/>
      <text:p text:style-name="P7">This security mechanism is called:</text:p>
      <text:p text:style-name="P7">CORS (Cross-Origin Resource Sharing)</text:p>
      <text:p text:style-name="P7"/>
      <text:p text:style-name="P7">Since FastAPI backend was not configured to allow frontend origin, browser blocked requests before they even reached backend APIs.</text:p>
      <text:p text:style-name="P7"/>
      <text:p text:style-name="P7">Solution:</text:p>
      <text:p text:style-name="P7">Implemented CORSMiddleware in FastAPI application.</text:p>
      <text:p text:style-name="P7"/>
      <text:p text:style-name="P7">Added:</text:p>
      <text:p text:style-name="P7"/>
      <text:p text:style-name="P7">from fastapi.middleware.cors import CORSMiddleware</text:p>
      <text:p text:style-name="P7"><text:soft-page-break/></text:p>
      <text:p text:style-name="P7">Configured middleware:</text:p>
      <text:p text:style-name="P7"/>
      <text:p text:style-name="P7">app.add_middleware(</text:p>
      <text:p text:style-name="P7"><text:s text:c="4"/>CORSMiddleware,</text:p>
      <text:p text:style-name="P7"><text:s text:c="4"/>allow_origins=["http://localhost:3000"],</text:p>
      <text:p text:style-name="P7"><text:s text:c="4"/>allow_credentials=True,</text:p>
      <text:p text:style-name="P7"><text:s text:c="4"/>allow_methods=["*"],</text:p>
      <text:p text:style-name="P7"><text:s text:c="4"/>allow_headers=["*"],</text:p>
      <text:p text:style-name="P7">)</text:p>
      <text:p text:style-name="P7"/>
      <text:p text:style-name="P7">This explicitly allowed frontend origin to communicate with backend APIs securely.</text:p>
      <text:p text:style-name="P7"/>
      <text:p text:style-name="P7">After enabling CORS:</text:p>
      <text:p text:style-name="P7">- frontend requests succeeded</text:p>
      <text:p text:style-name="P7">- login APIs worked</text:p>
      <text:p text:style-name="P7">- frontend-backend integration became functional</text:p>
      <text:p text:style-name="P7"/>
      <text:p text:style-name="P7">Technical Concepts Learned:</text:p>
      <text:p text:style-name="P7">- Browser security policies</text:p>
      <text:p text:style-name="P7">- Cross-Origin Resource Sharing (CORS)</text:p>
      <text:p text:style-name="P7">- Frontend-backend API communication</text:p>
      <text:p text:style-name="P7">- Middleware architecture</text:p>
      <text:p text:style-name="P7">- Secure API access control</text:p>
      <text:p text:style-name="P7"/>
      <text:p text:style-name="P7">Enterprise Relevance:</text:p>
      <text:p text:style-name="P7">CORS configuration is a very important real-world security concept used in:</text:p>
      <text:p text:style-name="P7">- enterprise web applications</text:p>
      <text:p text:style-name="P7">- SaaS platforms</text:p>
      <text:p text:style-name="P7">- cloud-native systems</text:p>
      <text:p text:style-name="P7">- frontend-backend architectures</text:p>
      <text:p text:style-name="P7"/>
      <text:p text:style-name="P7">Improper CORS configuration can either:</text:p>
      <text:p text:style-name="P7">- block legitimate requests</text:p>
      <text:p text:style-name="P7">OR</text:p>
      <text:p text:style-name="P7">- create security vulnerabilities.</text:p>
      <text:p text:style-name="P7"/>
      <text:p text:style-name="P7">Understanding and configuring CORS correctly is an important backend engineering skill.</text:p>
      <text:p text:style-name="P7"/>
      <text:p text:style-name="P7"/>
      <text:p text:style-name="P5"/>
      <text:p text:style-name="P6"><text:span text:style-name="T6">4.1</text:span> <text:span text:style-name="T5">Jenkins Checkout Failure</text:span></text:p>
      <text:p text:style-name="Text_20_body"><text:span text:style-name="Strong_20_Emphasis"><text:span text:style-name="T4">Problem:</text:span></text:span><text:span text:style-name="T4"><text:line-break/>Jenkins could not clone the GitHub repository.</text:span></text:p>
      <text:p text:style-name="Text_20_body"><text:span text:style-name="Strong_20_Emphasis"><text:span text:style-name="T4">Root Cause:</text:span></text:span><text:span text:style-name="T4"><text:line-break/>Java spawn helper version mismatch after a Java update.</text:span></text:p>
      <text:p text:style-name="Text_20_body"><text:span text:style-name="Strong_20_Emphasis"><text:span text:style-name="T4">Fix:</text:span></text:span><text:span text:style-name="T4"><text:line-break/>Restarted Jenkins service and verified Git access.</text:span></text:p>
      <text:p text:style-name="Text_20_body"><text:soft-page-break/><text:span text:style-name="Strong_20_Emphasis"><text:span text:style-name="T4">Learning:</text:span></text:span><text:span text:style-name="T4"><text:line-break/>Always check Jenkins system logs before assuming Git or network issues.</text:span></text:p>
      <text:p text:style-name="P2"/>
      <text:h text:style-name="P1" text:outline-level="2"><text:span text:style-name="T8">4.2</text:span> <text:span text:style-name="T7">SonarQube Failure</text:span></text:h>
      <text:p text:style-name="Text_20_body"><text:span text:style-name="Strong_20_Emphasis"><text:span text:style-name="T4">Problem:</text:span></text:span><text:span text:style-name="T4"><text:line-break/>SonarQube stage was failing.</text:span></text:p>
      <text:p text:style-name="Text_20_body"><text:span text:style-name="Strong_20_Emphasis"><text:span text:style-name="T4">Root Cause:</text:span></text:span><text:span text:style-name="T4"><text:line-break/>Pipeline was already failing in Checkout stage.</text:span></text:p>
      <text:p text:style-name="Text_20_body"><text:span text:style-name="Strong_20_Emphasis"><text:span text:style-name="T4">Fix:</text:span></text:span><text:span text:style-name="T4"><text:line-break/>Resolved Checkout issue first.</text:span></text:p>
      <text:p text:style-name="Text_20_body"><text:span text:style-name="Strong_20_Emphasis"><text:span text:style-name="T4">Learning:</text:span></text:span><text:span text:style-name="T4"><text:line-break/>Fix the first failed stage before investigating downstream stages.</text:span></text:p>
      <text:p text:style-name="P2"/>
      <text:h text:style-name="P1" text:outline-level="2"><text:span text:style-name="T8">4.</text:span><text:span text:style-name="T7">3. Docker Build Failure</text:span></text:h>
      <text:p text:style-name="Text_20_body"><text:span text:style-name="Strong_20_Emphasis"><text:span text:style-name="T4">Problem:</text:span></text:span></text:p>
      <text:section text:style-name="Sect1" text:name="code-block-viewer">
        <text:p text:style-name="P3"><text:span text:style-name="Source_20_Text"><text:span text:style-name="T4">Dockerfile not found</text:span></text:span></text:p>
      </text:section>
      <text:p text:style-name="Text_20_body"><text:span text:style-name="Strong_20_Emphasis"><text:span text:style-name="T4">Root Cause:</text:span></text:span><text:span text:style-name="T4"><text:line-break/>Frontend code was not present in Jenkins workspace.</text:span></text:p>
      <text:p text:style-name="Text_20_body"><text:span text:style-name="Strong_20_Emphasis"><text:span text:style-name="T4">Fix:</text:span></text:span><text:span text:style-name="T4"><text:line-break/>Verified workspace contents and traced issue to Git configuration.</text:span></text:p>
      <text:p text:style-name="Text_20_body"><text:span text:style-name="Strong_20_Emphasis"><text:span text:style-name="T4">Learning:</text:span></text:span><text:span text:style-name="T4"><text:line-break/>Build errors are often caused by source-control problems.</text:span></text:p>
      <text:p text:style-name="P2"/>
      <text:h text:style-name="P1" text:outline-level="2"><text:span text:style-name="T8">4.</text:span><text:span text:style-name="T7">4.</text:span> <text:span text:style-name="T7">Git Submodule Issue ⭐</text:span></text:h>
      <text:p text:style-name="Text_20_body"><text:span text:style-name="Strong_20_Emphasis"><text:span text:style-name="T4">Problem:</text:span></text:span><text:span text:style-name="T4"><text:line-break/>Frontend files were missing in Jenkins.</text:span></text:p>
      <text:p text:style-name="Text_20_body"><text:span text:style-name="Strong_20_Emphasis"><text:span text:style-name="T4">Root Cause:</text:span></text:span><text:span text:style-name="T4"><text:line-break/>Frontend was accidentally committed as a Git submodule.</text:span></text:p>
      <text:p text:style-name="Text_20_body"><text:span text:style-name="Strong_20_Emphasis"><text:span text:style-name="T4">Fix:</text:span></text:span><text:span text:style-name="T4"><text:line-break/>Removed submodule reference and converted it into a normal directory.</text:span></text:p>
      <text:p text:style-name="Text_20_body"><text:span text:style-name="Strong_20_Emphasis"><text:span text:style-name="T4">Learning:</text:span></text:span><text:span text:style-name="T4"><text:line-break/>Understand the difference between Git repositories, submodules, and tracked files.</text:span></text:p>
      <text:p text:style-name="P2"/>
      <text:h text:style-name="P1" text:outline-level="2"><text:soft-page-break/><text:span text:style-name="T8">4.</text:span><text:span text:style-name="T7">5. Docker DNS Investigation</text:span></text:h>
      <text:p text:style-name="Text_20_body"><text:span text:style-name="Strong_20_Emphasis"><text:span text:style-name="T4">Problem:</text:span></text:span><text:span text:style-name="T4"><text:line-break/>GitHub access seemed broken.</text:span></text:p>
      <text:p text:style-name="Text_20_body"><text:span text:style-name="Strong_20_Emphasis"><text:span text:style-name="T4">Root Cause:</text:span></text:span><text:span text:style-name="T4"><text:line-break/>Not actually a DNS issue.</text:span></text:p>
      <text:p text:style-name="Text_20_body"><text:span text:style-name="Strong_20_Emphasis"><text:span text:style-name="T4">Fix:</text:span></text:span><text:span text:style-name="T4"><text:line-break/>Validated networking using Docker and Linux tools.</text:span></text:p>
      <text:p text:style-name="Text_20_body"><text:span text:style-name="Strong_20_Emphasis"><text:span text:style-name="T4">Learning:</text:span></text:span><text:span text:style-name="T4"><text:line-break/>Verify assumptions with commands instead of guessing.</text:span></text:p>
      <text:p text:style-name="P2"/>
      <text:h text:style-name="P1" text:outline-level="2">30-Second Interview Version</text:h>
      <text:p text:style-name="P4">During my DevSecOps project, I integrated Jenkins, SonarQube, Docker, FastAPI, React, PostgreSQL, and Trivy. I faced multiple issues such as Jenkins checkout failures, Java runtime mismatches, Docker build failures, and a broken Git submodule configuration. I used Linux, Git, Docker, and Jenkins diagnostics to identify root causes and successfully restored the complete CI/CD pipeline with automated code quality and security scanning.</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6T00:40:52.373258896</meta:creation-date>
    <meta:generator>LibreOffice/7.3.7.2$Linux_X86_64 LibreOffice_project/30$Build-2</meta:generator>
    <dc:date>2026-05-31T12:06:12.903456937</dc:date>
    <meta:editing-duration>PT2H18M27S</meta:editing-duration>
    <meta:editing-cycles>3</meta:editing-cycles>
    <meta:document-statistic meta:table-count="0" meta:image-count="0" meta:object-count="0" meta:page-count="6" meta:paragraph-count="155" meta:word-count="914" meta:character-count="6920" meta:non-whitespace-character-count="6141"/>
  </office:meta>
</office:document-meta>
</file>