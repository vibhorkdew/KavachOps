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8cm" table:align="left"/>
    </style:style>
    <style:style style:name="Table1.A" style:family="table-column">
      <style:table-column-properties style:column-width="3.03cm"/>
    </style:style>
    <style:style style:name="Table1.B" style:family="table-column">
      <style:table-column-properties style:column-width="2.8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48cm" table:align="left"/>
    </style:style>
    <style:style style:name="Table2.A" style:family="table-column">
      <style:table-column-properties style:column-width="3.12cm"/>
    </style:style>
    <style:style style:name="Table2.B" style:family="table-column">
      <style:table-column-properties style:column-width="5.52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23cm" table:align="left"/>
    </style:style>
    <style:style style:name="Table3.A" style:family="table-column">
      <style:table-column-properties style:column-width="1.951cm"/>
    </style:style>
    <style:style style:name="Table3.B" style:family="table-column">
      <style:table-column-properties style:column-width="7.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458cm" table:align="left"/>
    </style:style>
    <style:style style:name="Table4.A" style:family="table-column">
      <style:table-column-properties style:column-width="2.496cm"/>
    </style:style>
    <style:style style:name="Table4.B" style:family="table-column">
      <style:table-column-properties style:column-width="3.96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514cm" table:align="left"/>
    </style:style>
    <style:style style:name="Table5.A" style:family="table-column">
      <style:table-column-properties style:column-width="2.327cm"/>
    </style:style>
    <style:style style:name="Table5.B" style:family="table-column">
      <style:table-column-properties style:column-width="3.18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93cm" table:align="left"/>
    </style:style>
    <style:style style:name="Table6.A" style:family="table-column">
      <style:table-column-properties style:column-width="1.82cm"/>
    </style:style>
    <style:style style:name="Table6.B" style:family="table-column">
      <style:table-column-properties style:column-width="4.1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047cm" table:align="left"/>
    </style:style>
    <style:style style:name="Table7.A" style:family="table-column">
      <style:table-column-properties style:column-width="4.057cm"/>
    </style:style>
    <style:style style:name="Table7.B" style:family="table-column">
      <style:table-column-properties style:column-width="2.99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d39ea" officeooo:paragraph-rsid="000d39ea"/>
    </style:style>
    <style:style style:name="P2" style:family="paragraph" style:parent-style-name="Standard">
      <style:text-properties officeooo:rsid="000d39ea" officeooo:paragraph-rsid="000d39e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Heading_20_1">
      <style:text-properties officeooo:rsid="000d39ea" officeooo:paragraph-rsid="000d39ea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officeooo:rsid="000d39ea" officeooo:paragraph-rsid="000d39ea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4"/>
    <style:style style:name="P54" style:family="paragraph" style:parent-style-name="Text_20_body" style:list-style-name="L24">
      <style:paragraph-properties fo:margin-top="0cm" fo:margin-bottom="0cm" style:contextual-spacing="false"/>
    </style:style>
    <style:style style:name="P55" style:family="paragraph" style:parent-style-name="Text_20_body" style:list-style-name="L25"/>
    <style:style style:name="P56" style:family="paragraph" style:parent-style-name="Text_20_body" style:list-style-name="L25">
      <style:paragraph-properties fo:margin-top="0cm" fo:margin-bottom="0cm" style:contextual-spacing="false"/>
    </style:style>
    <style:style style:name="P57" style:family="paragraph" style:parent-style-name="Text_20_body" style:list-style-name="L26"/>
    <style:style style:name="P58" style:family="paragraph" style:parent-style-name="Text_20_body" style:list-style-name="L26">
      <style:paragraph-properties fo:margin-top="0cm" fo:margin-bottom="0cm" style:contextual-spacing="false"/>
    </style:style>
    <style:style style:name="P59" style:family="paragraph" style:parent-style-name="Text_20_body" style:list-style-name="L27"/>
    <style:style style:name="P60" style:family="paragraph" style:parent-style-name="Text_20_body" style:list-style-name="L27">
      <style:paragraph-properties fo:margin-top="0cm" fo:margin-bottom="0cm" style:contextual-spacing="false"/>
    </style:style>
    <style:style style:name="P61" style:family="paragraph" style:parent-style-name="Text_20_body" style:list-style-name="L28"/>
    <style:style style:name="P62" style:family="paragraph" style:parent-style-name="Text_20_body" style:list-style-name="L28">
      <style:paragraph-properties fo:margin-top="0cm" fo:margin-bottom="0cm" style:contextual-spacing="false"/>
    </style:style>
    <style:style style:name="P63" style:family="paragraph" style:parent-style-name="Text_20_body" style:list-style-name="L29"/>
    <style:style style:name="P64" style:family="paragraph" style:parent-style-name="Text_20_body" style:list-style-name="L29">
      <style:paragraph-properties fo:margin-top="0cm" fo:margin-bottom="0cm" style:contextual-spacing="false"/>
    </style:style>
    <style:style style:name="P65" style:family="paragraph" style:parent-style-name="Text_20_body" style:list-style-name="L30"/>
    <style:style style:name="P66" style:family="paragraph" style:parent-style-name="Text_20_body" style:list-style-name="L30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avachOps — Phase 1 Summary</text:h>
      <text:h text:style-name="Heading_20_2" text:outline-level="2"><text:span text:style-name="Emphasis">Foundation Setup &amp; Core Application Development</text:span></text:h>
      <text:p text:style-name="Text_20_body">Phase 1 focuses on building the core foundation of the KavachOps platform.</text:p>
      <text:p text:style-name="Text_20_body">The main objective of this phase is to create a secure, production-ready full-stack application structure that will later support DevSecOps, AI security analysis, Kubernetes deployment, and enterprise monitoring.</text:p>
      <text:p text:style-name="Horizontal_20_Line"/>
      <text:h text:style-name="Heading_20_1" text:outline-level="1">What We Built In Phase 1</text:h>
      <text:h text:style-name="Heading_20_2" text:outline-level="2">1. Project Structure</text:h>
      <text:p text:style-name="Text_20_body">We created an enterprise-level project structure separating:</text:p>
      <text:list xml:id="list279824414" text:style-name="L1">
        <text:list-item>
          <text:p text:style-name="P8">backend </text:p>
        </text:list-item>
        <text:list-item>
          <text:p text:style-name="P8">frontend </text:p>
        </text:list-item>
        <text:list-item>
          <text:p text:style-name="P8">database </text:p>
        </text:list-item>
        <text:list-item>
          <text:p text:style-name="P8">configuration </text:p>
        </text:list-item>
        <text:list-item>
          <text:p text:style-name="P7">Docker setup </text:p>
        </text:list-item>
      </text:list>
      <text:p text:style-name="Text_20_body">This follows real-world microservice architecture practices.</text:p>
      <text:p text:style-name="Horizontal_20_Line"/>
      <text:h text:style-name="Heading_20_1" text:outline-level="1">2. Backend Development</text:h>
      <text:p text:style-name="Text_20_body">We used:</text:p>
      <text:h text:style-name="Heading_20_1" text:outline-level="1">FastAPI</text:h>
      <text:p text:style-name="Text_20_body">to build the backend API server.</text:p>
      <text:p text:style-name="Text_20_body">The backend is responsible for:</text:p>
      <text:list xml:id="list1288509722" text:style-name="L2">
        <text:list-item>
          <text:p text:style-name="P10">authentication </text:p>
        </text:list-item>
        <text:list-item>
          <text:p text:style-name="P10">business logic </text:p>
        </text:list-item>
        <text:list-item>
          <text:p text:style-name="P10">API handling </text:p>
        </text:list-item>
        <text:list-item>
          <text:p text:style-name="P10">database operations </text:p>
        </text:list-item>
        <text:list-item>
          <text:p text:style-name="P9">future AI integrations </text:p>
        </text:list-item>
      </text:list>
      <text:p text:style-name="Text_20_body">We created:</text:p>
      <text:list xml:id="list1203092042" text:style-name="L3">
        <text:list-item>
          <text:p text:style-name="P12">FastAPI application </text:p>
        </text:list-item>
        <text:list-item>
          <text:p text:style-name="P12">API routes </text:p>
        </text:list-item>
        <text:list-item>
          <text:p text:style-name="P12"><text:soft-page-break/>Swagger API documentation </text:p>
        </text:list-item>
        <text:list-item>
          <text:p text:style-name="P11">modular folder structure </text:p>
        </text:list-item>
      </text:list>
      <text:p text:style-name="Horizontal_20_Line"/>
      <text:h text:style-name="Heading_20_1" text:outline-level="1">3. Database Setup</text:h>
      <text:p text:style-name="Text_20_body">We integrated:</text:p>
      <text:h text:style-name="Heading_20_1" text:outline-level="1">PostgreSQL</text:h>
      <text:p text:style-name="Text_20_body">as the primary database system.</text:p>
      <text:p text:style-name="Text_20_body">The database will store:</text:p>
      <text:list xml:id="list5486985" text:style-name="L4">
        <text:list-item>
          <text:p text:style-name="P14">user accounts </text:p>
        </text:list-item>
        <text:list-item>
          <text:p text:style-name="P14">roles </text:p>
        </text:list-item>
        <text:list-item>
          <text:p text:style-name="P14">vulnerabilities </text:p>
        </text:list-item>
        <text:list-item>
          <text:p text:style-name="P14">alerts </text:p>
        </text:list-item>
        <text:list-item>
          <text:p text:style-name="P14">incident logs </text:p>
        </text:list-item>
        <text:list-item>
          <text:p text:style-name="P13">audit records </text:p>
        </text:list-item>
      </text:list>
      <text:p text:style-name="Text_20_body">This gives KavachOps full DBMS functionality.</text:p>
      <text:p text:style-name="Horizontal_20_Line"/>
      <text:h text:style-name="Heading_20_1" text:outline-level="1">4. Redis Integration</text:h>
      <text:p text:style-name="Text_20_body">We installed:</text:p>
      <text:h text:style-name="Heading_20_1" text:outline-level="1">Redis</text:h>
      <text:p text:style-name="Text_20_body">Redis will later be used for:</text:p>
      <text:list xml:id="list2996790058" text:style-name="L5">
        <text:list-item>
          <text:p text:style-name="P16">caching </text:p>
        </text:list-item>
        <text:list-item>
          <text:p text:style-name="P16">session management </text:p>
        </text:list-item>
        <text:list-item>
          <text:p text:style-name="P16">JWT token handling </text:p>
        </text:list-item>
        <text:list-item>
          <text:p text:style-name="P15">rate limiting </text:p>
        </text:list-item>
      </text:list>
      <text:p text:style-name="Horizontal_20_Line"/>
      <text:h text:style-name="Heading_20_1" text:outline-level="1">5. Authentication Foundation</text:h>
      <text:p text:style-name="Text_20_body">We prepared the structure for:</text:p>
      <text:list xml:id="list4218630253" text:style-name="L6">
        <text:list-item>
          <text:p text:style-name="P18">JWT authentication </text:p>
        </text:list-item>
        <text:list-item>
          <text:p text:style-name="P18">password hashing </text:p>
        </text:list-item>
        <text:list-item>
          <text:p text:style-name="P17">RBAC (Role-Based Access Control) </text:p>
        </text:list-item>
      </text:list>
      <text:p text:style-name="Text_20_body"><text:soft-page-break/>Planned roles:</text:p>
      <text:list xml:id="list4288247124" text:style-name="L7">
        <text:list-item>
          <text:p text:style-name="P20">Admin </text:p>
        </text:list-item>
        <text:list-item>
          <text:p text:style-name="P20">Security Analyst </text:p>
        </text:list-item>
        <text:list-item>
          <text:p text:style-name="P20">Developer </text:p>
        </text:list-item>
        <text:list-item>
          <text:p text:style-name="P19">Viewer </text:p>
        </text:list-item>
      </text:list>
      <text:p text:style-name="Horizontal_20_Line"/>
      <text:h text:style-name="Heading_20_1" text:outline-level="1">6. Docker Containerization</text:h>
      <text:p text:style-name="Text_20_body">We containerized the backend using:</text:p>
      <text:h text:style-name="Heading_20_1" text:outline-level="1">Docker</text:h>
      <text:p text:style-name="Text_20_body">We created:</text:p>
      <text:list xml:id="list3311219779" text:style-name="L8">
        <text:list-item>
          <text:p text:style-name="P22">Dockerfile </text:p>
        </text:list-item>
        <text:list-item>
          <text:p text:style-name="P22">Docker image </text:p>
        </text:list-item>
        <text:list-item>
          <text:p text:style-name="P21">running backend container </text:p>
        </text:list-item>
      </text:list>
      <text:p text:style-name="Text_20_body">This ensures:</text:p>
      <text:list xml:id="list3842752732" text:style-name="L9">
        <text:list-item>
          <text:p text:style-name="P24">portability </text:p>
        </text:list-item>
        <text:list-item>
          <text:p text:style-name="P24">consistent environments </text:p>
        </text:list-item>
        <text:list-item>
          <text:p text:style-name="P23">cloud-native deployment readiness </text:p>
        </text:list-item>
      </text:list>
      <text:p text:style-name="Horizontal_20_Line"/>
      <text:h text:style-name="Heading_20_1" text:outline-level="1">7. Swagger Documentation</text:h>
      <text:p text:style-name="Text_20_body">FastAPI automatically generated:</text:p>
      <text:section text:style-name="Sect1" text:name="code-block-viewer">
        <text:p text:style-name="P3"><text:span text:style-name="Source_20_Text">/docs</text:span></text:p>
      </text:section>
      <text:p text:style-name="Text_20_body">This provides:</text:p>
      <text:list xml:id="list1887865122" text:style-name="L10">
        <text:list-item>
          <text:p text:style-name="P26">API testing </text:p>
        </text:list-item>
        <text:list-item>
          <text:p text:style-name="P26">API visualization </text:p>
        </text:list-item>
        <text:list-item>
          <text:p text:style-name="P25">endpoint documentation </text:p>
        </text:list-item>
      </text:list>
      <text:p text:style-name="Text_20_body">Very important in enterprise API development.</text:p>
      <text:p text:style-name="Horizontal_20_Line"/>
      <text:h text:style-name="Heading_20_1" text:outline-level="1">8. Enterprise Architecture Foundation</text:h>
      <text:p text:style-name="Text_20_body">Phase 1 established:</text:p>
      <text:list xml:id="list869700312" text:style-name="L11">
        <text:list-item>
          <text:p text:style-name="P28">frontend-backend separation </text:p>
        </text:list-item>
        <text:list-item>
          <text:p text:style-name="P28">API-based communication </text:p>
        </text:list-item>
        <text:list-item>
          <text:p text:style-name="P28"><text:soft-page-break/>modular architecture </text:p>
        </text:list-item>
        <text:list-item>
          <text:p text:style-name="P27">scalable project design </text:p>
        </text:list-item>
      </text:list>
      <text:p text:style-name="Text_20_body">This becomes the base for future:</text:p>
      <text:list xml:id="list3693896484" text:style-name="L12">
        <text:list-item>
          <text:p text:style-name="P30">DevSecOps </text:p>
        </text:list-item>
        <text:list-item>
          <text:p text:style-name="P30">Kubernetes </text:p>
        </text:list-item>
        <text:list-item>
          <text:p text:style-name="P30">AI threat analysis </text:p>
        </text:list-item>
        <text:list-item>
          <text:p text:style-name="P30">monitoring </text:p>
        </text:list-item>
        <text:list-item>
          <text:p text:style-name="P29">security automation </text:p>
        </text:list-item>
      </text:list>
      <text:p text:style-name="Horizontal_20_Line"/>
      <text:h text:style-name="Heading_20_1" text:outline-level="1">Technologies Used In Phase 1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FastAPI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PostgreSQL</text:p>
          </table:table-cell>
        </table:table-row>
        <table:table-row>
          <table:table-cell table:style-name="Table1.A1" office:value-type="string">
            <text:p text:style-name="Table_20_Contents">Cache</text:p>
          </table:table-cell>
          <table:table-cell table:style-name="Table1.A1" office:value-type="string">
            <text:p text:style-name="Table_20_Contents">Redis</text:p>
          </table:table-cell>
        </table:table-row>
        <table:table-row>
          <table:table-cell table:style-name="Table1.A1" office:value-type="string">
            <text:p text:style-name="Table_20_Contents">Containerization</text:p>
          </table:table-cell>
          <table:table-cell table:style-name="Table1.A1" office:value-type="string">
            <text:p text:style-name="Table_20_Contents">Docker</text:p>
          </table:table-cell>
        </table:table-row>
        <table:table-row>
          <table:table-cell table:style-name="Table1.A1" office:value-type="string">
            <text:p text:style-name="Table_20_Contents">API Docs</text:p>
          </table:table-cell>
          <table:table-cell table:style-name="Table1.A1" office:value-type="string">
            <text:p text:style-name="Table_20_Contents">Swagger</text:p>
          </table:table-cell>
        </table:table-row>
        <table:table-row>
          <table:table-cell table:style-name="Table1.A1" office:value-type="string">
            <text:p text:style-name="Table_20_Contents">Authentication</text:p>
          </table:table-cell>
          <table:table-cell table:style-name="Table1.A1" office:value-type="string">
            <text:p text:style-name="Table_20_Contents">JWT (planned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KavachOps — Phase 2 Detailed Explanation</text:h>
      <text:h text:style-name="Heading_20_1" text:outline-level="1">Authentication, Database Integration &amp; Core Backend Logic</text:h>
      <text:p text:style-name="Horizontal_20_Line"/>
      <text:h text:style-name="Heading_20_1" text:outline-level="1">MAIN OBJECTIVE OF PHASE 2</text:h>
      <text:p text:style-name="Text_20_body">Phase 2 focused on converting KavachOps from:</text:p>
      <text:section text:style-name="Sect1" text:name="Section1">
        <text:p text:style-name="P3"><text:bookmark text:name="code-block-viewer"/><text:span text:style-name="Source_20_Text">basic backend setup</text:span></text:p>
      </text:section>
      <text:p text:style-name="Text_20_body">into:</text:p>
      <text:section text:style-name="Sect1" text:name="Section2">
        <text:p text:style-name="P3"><text:bookmark text:name="code-block-viewer1"/><text:span text:style-name="Source_20_Text">real enterprise-style backend application</text:span></text:p>
      </text:section>
      <text:p text:style-name="Text_20_body">This phase mainly implemented:</text:p>
      <text:list xml:id="list940501534" text:style-name="L13">
        <text:list-item>
          <text:p text:style-name="P32">authentication system </text:p>
        </text:list-item>
        <text:list-item>
          <text:p text:style-name="P32">database integration </text:p>
        </text:list-item>
        <text:list-item>
          <text:p text:style-name="P32">ORM models </text:p>
        </text:list-item>
        <text:list-item>
          <text:p text:style-name="P32">API logic </text:p>
        </text:list-item>
        <text:list-item>
          <text:p text:style-name="P32">JWT security </text:p>
        </text:list-item>
        <text:list-item>
          <text:p text:style-name="P32">password hashing </text:p>
        </text:list-item>
        <text:list-item>
          <text:p text:style-name="P32">protected backend architecture </text:p>
        </text:list-item>
        <text:list-item>
          <text:p text:style-name="P31">AI foundation structure </text:p>
        </text:list-item>
      </text:list>
      <text:p text:style-name="Horizontal_20_Line"/>
      <text:h text:style-name="Heading_20_1" text:outline-level="1">OVERALL FLOW OF PHASE 2</text:h>
      <text:section text:style-name="Sect1" text:name="Section3">
        <text:p text:style-name="Preformatted_20_Text"><text:bookmark text:name="code-block-viewer2"/><text:span text:style-name="Source_20_Text">Frontend/User</text:span></text:p>
        <text:p text:style-name="Preformatted_20_Text"><text:span text:style-name="Source_20_Text"><text:s text:c="6"/>↓</text:span></text:p>
        <text:p text:style-name="Preformatted_20_Text"><text:span text:style-name="Source_20_Text">FastAPI APIs</text:span></text:p>
        <text:p text:style-name="Preformatted_20_Text"><text:span text:style-name="Source_20_Text"><text:s text:c="6"/>↓</text:span></text:p>
        <text:p text:style-name="Preformatted_20_Text"><text:span text:style-name="Source_20_Text">Validation Layer</text:span></text:p>
        <text:p text:style-name="Preformatted_20_Text"><text:span text:style-name="Source_20_Text"><text:s text:c="6"/>↓</text:span></text:p>
        <text:p text:style-name="Preformatted_20_Text"><text:span text:style-name="Source_20_Text">Authentication Logic</text:span></text:p>
        <text:p text:style-name="Preformatted_20_Text"><text:span text:style-name="Source_20_Text"><text:s text:c="6"/>↓</text:span></text:p>
        <text:p text:style-name="Preformatted_20_Text"><text:span text:style-name="Source_20_Text">Database Operations</text:span></text:p>
        <text:p text:style-name="Preformatted_20_Text"><text:span text:style-name="Source_20_Text"><text:s text:c="6"/>↓</text:span></text:p>
        <text:p text:style-name="Preformatted_20_Text"><text:span text:style-name="Source_20_Text">PostgreSQL Storage</text:span></text:p>
        <text:p text:style-name="Preformatted_20_Text"><text:span text:style-name="Source_20_Text"><text:s text:c="6"/>↓</text:span></text:p>
        <text:p text:style-name="Preformatted_20_Text"><text:span text:style-name="Source_20_Text">JWT Token Generation</text:span></text:p>
        <text:p text:style-name="Preformatted_20_Text"><text:span text:style-name="Source_20_Text"><text:s text:c="6"/>↓</text:span></text:p>
        <text:p text:style-name="P3"><text:span text:style-name="Source_20_Text">Protected API Access</text:span></text:p>
      </text:section>
      <text:p text:style-name="Horizontal_20_Line"/>
      <text:h text:style-name="Heading_20_1" text:outline-level="1"><text:soft-page-break/>PHASE 2 CORE COMPON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FastAPI</text:p>
          </table:table-cell>
          <table:table-cell table:style-name="Table2.A1" office:value-type="string">
            <text:p text:style-name="Table_20_Contents">backend APIs</text:p>
          </table:table-cell>
        </table:table-row>
        <table:table-row>
          <table:table-cell table:style-name="Table2.A1" office:value-type="string">
            <text:p text:style-name="Table_20_Contents">PostgreSQL</text:p>
          </table:table-cell>
          <table:table-cell table:style-name="Table2.A1" office:value-type="string">
            <text:p text:style-name="Table_20_Contents">data storage</text:p>
          </table:table-cell>
        </table:table-row>
        <table:table-row>
          <table:table-cell table:style-name="Table2.A1" office:value-type="string">
            <text:p text:style-name="Table_20_Contents">SQLAlchemy</text:p>
          </table:table-cell>
          <table:table-cell table:style-name="Table2.A1" office:value-type="string">
            <text:p text:style-name="Table_20_Contents">ORM/database communication</text:p>
          </table:table-cell>
        </table:table-row>
        <table:table-row>
          <table:table-cell table:style-name="Table2.A1" office:value-type="string">
            <text:p text:style-name="Table_20_Contents">Pydantic</text:p>
          </table:table-cell>
          <table:table-cell table:style-name="Table2.A1" office:value-type="string">
            <text:p text:style-name="Table_20_Contents">request validation</text:p>
          </table:table-cell>
        </table:table-row>
        <table:table-row>
          <table:table-cell table:style-name="Table2.A1" office:value-type="string">
            <text:p text:style-name="Table_20_Contents">bcrypt</text:p>
          </table:table-cell>
          <table:table-cell table:style-name="Table2.A1" office:value-type="string">
            <text:p text:style-name="Table_20_Contents">password hashing</text:p>
          </table:table-cell>
        </table:table-row>
        <table:table-row>
          <table:table-cell table:style-name="Table2.A1" office:value-type="string">
            <text:p text:style-name="Table_20_Contents">JWT</text:p>
          </table:table-cell>
          <table:table-cell table:style-name="Table2.A1" office:value-type="string">
            <text:p text:style-name="Table_20_Contents">authentication token</text:p>
          </table:table-cell>
        </table:table-row>
        <table:table-row>
          <table:table-cell table:style-name="Table2.A1" office:value-type="string">
            <text:p text:style-name="Table_20_Contents">AI Service Layer</text:p>
          </table:table-cell>
          <table:table-cell table:style-name="Table2.A1" office:value-type="string">
            <text:p text:style-name="Table_20_Contents">future AI integration</text:p>
          </table:table-cell>
        </table:table-row>
      </table:table>
      <text:p text:style-name="Horizontal_20_Line"/>
      <text:h text:style-name="Heading_20_1" text:outline-level="1">1. DATABASE CONNECTION LAYER</text:h>
      <text:p text:style-name="Text_20_body">File:</text:p>
      <text:section text:style-name="Sect1" text:name="Section4">
        <text:p text:style-name="P3"><text:bookmark text:name="code-block-viewer3"/><text:span text:style-name="Source_20_Text">app/database/db.py</text:span></text:p>
      </text:section>
      <text:p text:style-name="Horizontal_20_Line"/>
      <text:h text:style-name="Heading_20_1" text:outline-level="1">Purpose</text:h>
      <text:p text:style-name="Text_20_body">This file creates connection between:</text:p>
      <text:section text:style-name="Sect1" text:name="Section5">
        <text:p text:style-name="P3"><text:bookmark text:name="code-block-viewer4"/><text:span text:style-name="Source_20_Text">FastAPI ↔ PostgreSQL</text:span></text:p>
      </text:section>
      <text:p text:style-name="Text_20_body">Without this:<text:line-break/>backend cannot communicate with database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create_engine</text:span></text:h>
      <text:section text:style-name="Sect1" text:name="Section6">
        <text:p text:style-name="P3"><text:bookmark text:name="code-block-viewer5"/><text:span text:style-name="Source_20_Text">from sqlalchemy import create_engine</text:span></text:p>
      </text:section>
      <text:p text:style-name="Text_20_body">Purpose:<text:line-break/>Creates actual PostgreSQL connection engine.</text:p>
      <text:p text:style-name="Text_20_body">Think:</text:p>
      <text:section text:style-name="Sect1" text:name="Section7">
        <text:p text:style-name="P3"><text:bookmark text:name="code-block-viewer6"/><text:span text:style-name="Source_20_Text">bridge between Python and database</text:span></text:p>
      </text:section>
      <text:p text:style-name="Horizontal_20_Line"/>
      <text:h text:style-name="Heading_20_1" text:outline-level="1"><text:soft-page-break/><text:span text:style-name="Source_20_Text">sessionmaker</text:span></text:h>
      <text:section text:style-name="Sect1" text:name="Section8">
        <text:p text:style-name="P3"><text:bookmark text:name="code-block-viewer7"/><text:span text:style-name="Source_20_Text">from sqlalchemy.orm import sessionmaker</text:span></text:p>
      </text:section>
      <text:p text:style-name="Text_20_body">Purpose:<text:line-break/>Creates database sessions.</text:p>
      <text:p text:style-name="Text_20_body">Used for:</text:p>
      <text:list xml:id="list382698222" text:style-name="L14">
        <text:list-item>
          <text:p text:style-name="P35">insert </text:p>
        </text:list-item>
        <text:list-item>
          <text:p text:style-name="P35">update </text:p>
        </text:list-item>
        <text:list-item>
          <text:p text:style-name="P35">delete </text:p>
        </text:list-item>
        <text:list-item>
          <text:p text:style-name="P34">queries </text:p>
        </text:list-item>
      </text:list>
      <text:p text:style-name="Horizontal_20_Line"/>
      <text:h text:style-name="Heading_20_1" text:outline-level="1"><text:span text:style-name="Source_20_Text">declarative_base</text:span></text:h>
      <text:section text:style-name="Sect1" text:name="Section9">
        <text:p text:style-name="P3"><text:bookmark text:name="code-block-viewer8"/><text:span text:style-name="Source_20_Text">from sqlalchemy.ext.declarative import declarative_base</text:span></text:p>
      </text:section>
      <text:p text:style-name="Text_20_body">Purpose:<text:line-break/>Base class for all ORM models.</text:p>
      <text:p text:style-name="Text_20_body">All tables inherit from this.</text:p>
      <text:p text:style-name="Horizontal_20_Line"/>
      <text:h text:style-name="Heading_20_1" text:outline-level="1"><text:span text:style-name="Source_20_Text">dotenv</text:span></text:h>
      <text:section text:style-name="Sect1" text:name="Section10">
        <text:p text:style-name="P3"><text:bookmark text:name="code-block-viewer9"/><text:span text:style-name="Source_20_Text">from dotenv import load_dotenv</text:span></text:p>
      </text:section>
      <text:p text:style-name="Text_20_body">Purpose:<text:line-break/>Loads environment variables from:</text:p>
      <text:section text:style-name="Sect1" text:name="Section11">
        <text:p text:style-name="P3"><text:bookmark text:name="code-block-viewer10"/><text:span text:style-name="Source_20_Text">.env</text:span></text:p>
      </text:section>
      <text:p text:style-name="Text_20_body">Used for:</text:p>
      <text:list xml:id="list3010899471" text:style-name="L15">
        <text:list-item>
          <text:p text:style-name="P37">DB URL </text:p>
        </text:list-item>
        <text:list-item>
          <text:p text:style-name="P37">JWT secret </text:p>
        </text:list-item>
        <text:list-item>
          <text:p text:style-name="P36">configs </text:p>
        </text:list-item>
      </text:list>
      <text:p text:style-name="Horizontal_20_Line"/>
      <text:h text:style-name="Heading_20_1" text:outline-level="1">Why Important</text:h>
      <text:p text:style-name="Text_20_body">This layer centralizes:</text:p>
      <text:list xml:id="list3926138534" text:style-name="L16">
        <text:list-item>
          <text:p text:style-name="P39">DB connection </text:p>
        </text:list-item>
        <text:list-item>
          <text:p text:style-name="P39">sessions </text:p>
        </text:list-item>
        <text:list-item>
          <text:p text:style-name="P38">engine configuration </text:p>
        </text:list-item>
      </text:list>
      <text:p text:style-name="Text_20_body"><text:soft-page-break/>This is enterprise backend architecture.</text:p>
      <text:p text:style-name="Horizontal_20_Line"/>
      <text:h text:style-name="Heading_20_1" text:outline-level="1">2. USER MODEL</text:h>
      <text:p text:style-name="Text_20_body">File:</text:p>
      <text:section text:style-name="Sect1" text:name="Section12">
        <text:p text:style-name="P3"><text:bookmark text:name="code-block-viewer11"/><text:span text:style-name="Source_20_Text">app/models/user.py</text:span></text:p>
      </text:section>
      <text:p text:style-name="Horizontal_20_Line"/>
      <text:h text:style-name="Heading_20_1" text:outline-level="1">Purpose</text:h>
      <text:p text:style-name="Text_20_body">Creates:</text:p>
      <text:h text:style-name="Heading_20_1" text:outline-level="1"><text:span text:style-name="Source_20_Text">users</text:span> table</text:h>
      <text:p text:style-name="Text_20_body">inside PostgreSQL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Column</text:span></text:h>
      <text:section text:style-name="Sect1" text:name="Section13">
        <text:p text:style-name="P3"><text:bookmark text:name="code-block-viewer12"/><text:span text:style-name="Source_20_Text">from sqlalchemy import Column</text:span></text:p>
      </text:section>
      <text:p text:style-name="Text_20_body">Defines DB columns.</text:p>
      <text:p text:style-name="Horizontal_20_Line"/>
      <text:h text:style-name="Heading_20_1" text:outline-level="1"><text:span text:style-name="Source_20_Text">Integer</text:span></text:h>
      <text:section text:style-name="Sect1" text:name="Section14">
        <text:p text:style-name="P3"><text:bookmark text:name="code-block-viewer13"/><text:span text:style-name="Source_20_Text">Integer</text:span></text:p>
      </text:section>
      <text:p text:style-name="Text_20_body">Used for:</text:p>
      <text:section text:style-name="Sect1" text:name="Section15">
        <text:p text:style-name="P3"><text:bookmark text:name="code-block-viewer14"/><text:span text:style-name="Source_20_Text">id</text:span></text:p>
      </text:section>
      <text:p text:style-name="Horizontal_20_Line"/>
      <text:h text:style-name="Heading_20_1" text:outline-level="1"><text:span text:style-name="Source_20_Text">String</text:span></text:h>
      <text:section text:style-name="Sect1" text:name="Section16">
        <text:p text:style-name="P3"><text:bookmark text:name="code-block-viewer15"/><text:span text:style-name="Source_20_Text">String</text:span></text:p>
      </text:section>
      <text:p text:style-name="Text_20_body">Used for:</text:p>
      <text:list xml:id="list1816302146" text:style-name="L17">
        <text:list-item>
          <text:p text:style-name="P41"><text:soft-page-break/>username </text:p>
        </text:list-item>
        <text:list-item>
          <text:p text:style-name="P41">email </text:p>
        </text:list-item>
        <text:list-item>
          <text:p text:style-name="P41">password </text:p>
        </text:list-item>
        <text:list-item>
          <text:p text:style-name="P40">role </text:p>
        </text:list-item>
      </text:list>
      <text:p text:style-name="Horizontal_20_Line"/>
      <text:h text:style-name="Heading_20_1" text:outline-level="1"><text:span text:style-name="Source_20_Text">Boolean</text:span></text:h>
      <text:section text:style-name="Sect1" text:name="Section17">
        <text:p text:style-name="P3"><text:bookmark text:name="code-block-viewer16"/><text:span text:style-name="Source_20_Text">Boolean</text:span></text:p>
      </text:section>
      <text:p text:style-name="Text_20_body">Used for:</text:p>
      <text:section text:style-name="Sect1" text:name="Section18">
        <text:p text:style-name="P3"><text:bookmark text:name="code-block-viewer17"/><text:span text:style-name="Source_20_Text">is_active</text:span></text:p>
      </text:section>
      <text:p text:style-name="Horizontal_20_Line"/>
      <text:h text:style-name="Heading_20_1" text:outline-level="1">Why User Model Important</text:h>
      <text:p text:style-name="Text_20_body">Stores:</text:p>
      <text:list xml:id="list3633817343" text:style-name="L18">
        <text:list-item>
          <text:p text:style-name="P43">authentication data </text:p>
        </text:list-item>
        <text:list-item>
          <text:p text:style-name="P43">user roles </text:p>
        </text:list-item>
        <text:list-item>
          <text:p text:style-name="P42">account status </text:p>
        </text:list-item>
      </text:list>
      <text:p text:style-name="Text_20_body">Foundation of RBAC system.</text:p>
      <text:p text:style-name="Horizontal_20_Line"/>
      <text:h text:style-name="Heading_20_1" text:outline-level="1">3. DATABASE INITIALIZATION</text:h>
      <text:p text:style-name="Text_20_body">File:</text:p>
      <text:section text:style-name="Sect1" text:name="Section19">
        <text:p text:style-name="P3"><text:bookmark text:name="code-block-viewer18"/><text:span text:style-name="Source_20_Text">app/database/init_db.py</text:span></text:p>
      </text:section>
      <text:p text:style-name="Horizontal_20_Line"/>
      <text:h text:style-name="Heading_20_1" text:outline-level="1">Purpose</text:h>
      <text:p text:style-name="Text_20_body">Creates tables automatically in PostgreSQL.</text:p>
      <text:p text:style-name="Horizontal_20_Line"/>
      <text:h text:style-name="Heading_20_1" text:outline-level="1">Important Function</text:h>
      <text:section text:style-name="Sect1" text:name="Section20">
        <text:p text:style-name="P3"><text:bookmark text:name="code-block-viewer19"/><text:span text:style-name="Source_20_Text">metadata.create_all()</text:span></text:p>
      </text:section>
      <text:p text:style-name="Text_20_body">Purpose:<text:line-break/>Creates actual database tables from ORM models.</text:p>
      <text:p text:style-name="Horizontal_20_Line"/>
      <text:h text:style-name="Heading_20_1" text:outline-level="1"><text:soft-page-break/>What Happened Internally</text:h>
      <text:section text:style-name="Sect1" text:name="Section21">
        <text:p text:style-name="Preformatted_20_Text"><text:bookmark text:name="code-block-viewer20"/><text:span text:style-name="Source_20_Text">Python Model</text:span></text:p>
        <text:p text:style-name="Preformatted_20_Text"><text:span text:style-name="Source_20_Text"><text:s text:c="6"/>↓</text:span></text:p>
        <text:p text:style-name="Preformatted_20_Text"><text:span text:style-name="Source_20_Text">SQLAlchemy ORM</text:span></text:p>
        <text:p text:style-name="Preformatted_20_Text"><text:span text:style-name="Source_20_Text"><text:s text:c="6"/>↓</text:span></text:p>
        <text:p text:style-name="Preformatted_20_Text"><text:span text:style-name="Source_20_Text">Converts into SQL</text:span></text:p>
        <text:p text:style-name="Preformatted_20_Text"><text:span text:style-name="Source_20_Text"><text:s text:c="6"/>↓</text:span></text:p>
        <text:p text:style-name="P3"><text:span text:style-name="Source_20_Text">Creates PostgreSQL Table</text:span></text:p>
      </text:section>
      <text:p text:style-name="Horizontal_20_Line"/>
      <text:h text:style-name="Heading_20_1" text:outline-level="1">4. PYDANTIC SCHEMAS</text:h>
      <text:p text:style-name="Text_20_body">File:</text:p>
      <text:section text:style-name="Sect1" text:name="Section22">
        <text:p text:style-name="P3"><text:bookmark text:name="code-block-viewer21"/><text:span text:style-name="Source_20_Text">app/schemas/user_schema.py</text:span></text:p>
      </text:section>
      <text:p text:style-name="Horizontal_20_Line"/>
      <text:h text:style-name="Heading_20_1" text:outline-level="1">Purpose</text:h>
      <text:p text:style-name="Text_20_body">Validates incoming API request data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BaseModel</text:span></text:h>
      <text:section text:style-name="Sect1" text:name="Section23">
        <text:p text:style-name="P3"><text:bookmark text:name="code-block-viewer22"/><text:span text:style-name="Source_20_Text">from pydantic import BaseModel</text:span></text:p>
      </text:section>
      <text:p text:style-name="Text_20_body">Purpose:<text:line-break/>Creates request validation schemas.</text:p>
      <text:p text:style-name="Horizontal_20_Line"/>
      <text:h text:style-name="Heading_20_1" text:outline-level="1"><text:span text:style-name="Source_20_Text">EmailStr</text:span></text:h>
      <text:section text:style-name="Sect1" text:name="Section24">
        <text:p text:style-name="P3"><text:bookmark text:name="code-block-viewer23"/><text:span text:style-name="Source_20_Text">EmailStr</text:span></text:p>
      </text:section>
      <text:p text:style-name="Text_20_body">Purpose:<text:line-break/>Validates proper email format.</text:p>
      <text:p text:style-name="Text_20_body">Example:</text:p>
      <text:section text:style-name="Sect1" text:name="Section25">
        <text:p text:style-name="Preformatted_20_Text"><text:bookmark text:name="code-block-viewer24"/><text:span text:style-name="Source_20_Text">admin@test.com ✔</text:span></text:p>
        <text:p text:style-name="P3"><text:span text:style-name="Source_20_Text">admin123 ❌</text:span></text:p>
      </text:section>
      <text:p text:style-name="Horizontal_20_Line"/>
      <text:h text:style-name="Heading_20_1" text:outline-level="1"><text:soft-page-break/>Why Pydantic Important</text:h>
      <text:p text:style-name="Text_20_body">Automatically validates:</text:p>
      <text:list xml:id="list2134744631" text:style-name="L19">
        <text:list-item>
          <text:p text:style-name="P45">types </text:p>
        </text:list-item>
        <text:list-item>
          <text:p text:style-name="P45">missing fields </text:p>
        </text:list-item>
        <text:list-item>
          <text:p text:style-name="P44">invalid formats </text:p>
        </text:list-item>
      </text:list>
      <text:p text:style-name="Text_20_body">Enterprise APIs rely heavily on validation.</text:p>
      <text:p text:style-name="Horizontal_20_Line"/>
      <text:h text:style-name="Heading_20_1" text:outline-level="1">5. PASSWORD HASHING SYSTEM</text:h>
      <text:p text:style-name="Text_20_body">File:</text:p>
      <text:section text:style-name="Sect1" text:name="Section26">
        <text:p text:style-name="P3"><text:bookmark text:name="code-block-viewer25"/><text:span text:style-name="Source_20_Text">app/core/security.py</text:span></text:p>
      </text:section>
      <text:p text:style-name="Horizontal_20_Line"/>
      <text:h text:style-name="Heading_20_1" text:outline-level="1">Purpose</text:h>
      <text:p text:style-name="Text_20_body">Protects passwords securely.</text:p>
      <text:p text:style-name="Horizontal_20_Line"/>
      <text:h text:style-name="Heading_20_1" text:outline-level="1">Module Used</text:h>
      <text:h text:style-name="Heading_20_1" text:outline-level="1"><text:span text:style-name="Source_20_Text">CryptContext</text:span></text:h>
      <text:section text:style-name="Sect1" text:name="Section27">
        <text:p text:style-name="P3"><text:bookmark text:name="code-block-viewer26"/><text:span text:style-name="Source_20_Text">from passlib.context import CryptContext</text:span></text:p>
      </text:section>
      <text:p text:style-name="Text_20_body">Purpose:<text:line-break/>Manages hashing algorithms.</text:p>
      <text:p text:style-name="Horizontal_20_Line"/>
      <text:h text:style-name="Heading_20_1" text:outline-level="1">Why bcrypt Used</text:h>
      <text:p text:style-name="Text_20_body">Passwords are NEVER stored directly.</text:p>
      <text:p text:style-name="Text_20_body">Instead:</text:p>
      <text:section text:style-name="Sect1" text:name="Section28">
        <text:p text:style-name="P3"><text:bookmark text:name="code-block-viewer27"/><text:span text:style-name="Source_20_Text">admin123</text:span></text:p>
      </text:section>
      <text:p text:style-name="Text_20_body">becomes:</text:p>
      <text:section text:style-name="Sect1" text:name="Section29">
        <text:p text:style-name="P3"><text:bookmark text:name="code-block-viewer28"/><text:span text:style-name="Source_20_Text">$2b$12$asdasdasd...</text:span></text:p>
      </text:section>
      <text:p text:style-name="Text_20_body">This prevents:</text:p>
      <text:list xml:id="list2394450300" text:style-name="L20">
        <text:list-item>
          <text:p text:style-name="P47"><text:soft-page-break/>password leaks </text:p>
        </text:list-item>
        <text:list-item>
          <text:p text:style-name="P46">credential theft </text:p>
        </text:list-item>
      </text:list>
      <text:p text:style-name="Text_20_body">Enterprise security standard.</text:p>
      <text:p text:style-name="Horizontal_20_Line"/>
      <text:h text:style-name="Heading_20_1" text:outline-level="1">Functions Created</text:h>
      <text:p text:style-name="Horizontal_20_Line"/>
      <text:h text:style-name="Heading_20_1" text:outline-level="1"><text:span text:style-name="Source_20_Text">hash_password()</text:span></text:h>
      <text:p text:style-name="Text_20_body">Converts plain password into hashed password.</text:p>
      <text:p text:style-name="Horizontal_20_Line"/>
      <text:h text:style-name="Heading_20_1" text:outline-level="1"><text:span text:style-name="Source_20_Text">verify_password()</text:span></text:h>
      <text:p text:style-name="Text_20_body">Checks:</text:p>
      <text:section text:style-name="Sect1" text:name="Section30">
        <text:p text:style-name="P3"><text:bookmark text:name="code-block-viewer29"/><text:span text:style-name="Source_20_Text">input password == stored hash ?</text:span></text:p>
      </text:section>
      <text:p text:style-name="Horizontal_20_Line"/>
      <text:h text:style-name="Heading_20_1" text:outline-level="1">6. JWT TOKEN SYSTEM</text:h>
      <text:p text:style-name="Text_20_body">File:</text:p>
      <text:section text:style-name="Sect1" text:name="Section31">
        <text:p text:style-name="P3"><text:bookmark text:name="code-block-viewer30"/><text:span text:style-name="Source_20_Text">app/core/jwt_handler.py</text:span></text:p>
      </text:section>
      <text:p text:style-name="Horizontal_20_Line"/>
      <text:h text:style-name="Heading_20_1" text:outline-level="1">Purpose</text:h>
      <text:p text:style-name="Text_20_body">Creates secure authentication tokens.</text:p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jwt</text:span></text:h>
      <text:section text:style-name="Sect1" text:name="Section32">
        <text:p text:style-name="P3"><text:bookmark text:name="code-block-viewer31"/><text:span text:style-name="Source_20_Text">from jose import jwt</text:span></text:p>
      </text:section>
      <text:p text:style-name="Text_20_body">Purpose:<text:line-break/>Encodes/decodes JWT tokens.</text:p>
      <text:p text:style-name="Horizontal_20_Line"><text:soft-page-break/></text:p>
      <text:h text:style-name="Heading_20_1" text:outline-level="1"><text:span text:style-name="Source_20_Text">datetime</text:span></text:h>
      <text:section text:style-name="Sect1" text:name="Section33">
        <text:p text:style-name="P3"><text:bookmark text:name="code-block-viewer32"/><text:span text:style-name="Source_20_Text">from datetime import datetime, timedelta</text:span></text:p>
      </text:section>
      <text:p text:style-name="Text_20_body">Purpose:<text:line-break/>Adds token expiration time.</text:p>
      <text:p text:style-name="Horizontal_20_Line"/>
      <text:h text:style-name="Heading_20_1" text:outline-level="1">Why JWT Important</text:h>
      <text:p text:style-name="Text_20_body">Instead of storing sessions on server:<text:line-break/>client stores token.</text:p>
      <text:p text:style-name="Text_20_body">Modern enterprise authentication system.</text:p>
      <text:p text:style-name="Horizontal_20_Line"/>
      <text:h text:style-name="Heading_20_1" text:outline-level="1">JWT Flow</text:h>
      <text:section text:style-name="Sect1" text:name="Section34">
        <text:p text:style-name="Preformatted_20_Text"><text:bookmark text:name="code-block-viewer33"/><text:span text:style-name="Source_20_Text">User logs in</text:span></text:p>
        <text:p text:style-name="Preformatted_20_Text"><text:span text:style-name="Source_20_Text"><text:s text:c="6"/>↓</text:span></text:p>
        <text:p text:style-name="Preformatted_20_Text"><text:span text:style-name="Source_20_Text">JWT token generated</text:span></text:p>
        <text:p text:style-name="Preformatted_20_Text"><text:span text:style-name="Source_20_Text"><text:s text:c="6"/>↓</text:span></text:p>
        <text:p text:style-name="Preformatted_20_Text"><text:span text:style-name="Source_20_Text">Frontend stores token</text:span></text:p>
        <text:p text:style-name="Preformatted_20_Text"><text:span text:style-name="Source_20_Text"><text:s text:c="6"/>↓</text:span></text:p>
        <text:p text:style-name="P3"><text:span text:style-name="Source_20_Text">Future APIs use token</text:span></text:p>
      </text:section>
      <text:p text:style-name="Horizontal_20_Line"/>
      <text:h text:style-name="Heading_20_1" text:outline-level="1">7. DATABASE DEPENDENCY</text:h>
      <text:p text:style-name="Text_20_body">File:</text:p>
      <text:section text:style-name="Sect1" text:name="Section35">
        <text:p text:style-name="P3"><text:bookmark text:name="code-block-viewer34"/><text:span text:style-name="Source_20_Text">app/database/deps.py</text:span></text:p>
      </text:section>
      <text:p text:style-name="Horizontal_20_Line"/>
      <text:h text:style-name="Heading_20_1" text:outline-level="1">Purpose</text:h>
      <text:p text:style-name="Text_20_body">Creates reusable database session dependency.</text:p>
      <text:p text:style-name="Horizontal_20_Line"/>
      <text:h text:style-name="Heading_20_1" text:outline-level="1">Important Concept</text:h>
      <text:section text:style-name="Sect1" text:name="Section36">
        <text:p text:style-name="P3"><text:bookmark text:name="code-block-viewer35"/><text:span text:style-name="Source_20_Text">yield db</text:span></text:p>
      </text:section>
      <text:p text:style-name="Text_20_body"><text:soft-page-break/>FastAPI dependency injection system.</text:p>
      <text:p text:style-name="Text_20_body">Automatically:</text:p>
      <text:list xml:id="list3363319825" text:style-name="L21">
        <text:list-item>
          <text:p text:style-name="P49">opens DB session </text:p>
        </text:list-item>
        <text:list-item>
          <text:p text:style-name="P48">closes DB session </text:p>
        </text:list-item>
      </text:list>
      <text:p text:style-name="Text_20_body">Very clean architecture.</text:p>
      <text:p text:style-name="Horizontal_20_Line"/>
      <text:h text:style-name="Heading_20_1" text:outline-level="1">8. AUTHENTICATION APIs</text:h>
      <text:p text:style-name="Text_20_body">File:</text:p>
      <text:section text:style-name="Sect1" text:name="Section37">
        <text:p text:style-name="P3"><text:bookmark text:name="code-block-viewer36"/><text:span text:style-name="Source_20_Text">app/api/auth.py</text:span></text:p>
      </text:section>
      <text:p text:style-name="Horizontal_20_Line"/>
      <text:h text:style-name="Heading_20_1" text:outline-level="1">Purpose</text:h>
      <text:p text:style-name="Text_20_body">Implements:</text:p>
      <text:list xml:id="list2215363974" text:style-name="L22">
        <text:list-item>
          <text:p text:style-name="P51">registration </text:p>
        </text:list-item>
        <text:list-item>
          <text:p text:style-name="P50">login </text:p>
        </text:list-item>
      </text:list>
      <text:p text:style-name="Horizontal_20_Line"/>
      <text:h text:style-name="Heading_20_1" text:outline-level="1">Modules Used</text:h>
      <text:p text:style-name="Horizontal_20_Line"/>
      <text:h text:style-name="Heading_20_1" text:outline-level="1"><text:span text:style-name="Source_20_Text">APIRouter</text:span></text:h>
      <text:section text:style-name="Sect1" text:name="Section38">
        <text:p text:style-name="P3"><text:bookmark text:name="code-block-viewer37"/><text:span text:style-name="Source_20_Text">from fastapi import APIRouter</text:span></text:p>
      </text:section>
      <text:p text:style-name="Text_20_body">Purpose:<text:line-break/>Creates modular API routes.</text:p>
      <text:p text:style-name="Text_20_body">Instead of everything inside <text:span text:style-name="Source_20_Text">main.py</text:span>.</text:p>
      <text:p text:style-name="Text_20_body">Enterprise backend practice.</text:p>
      <text:p text:style-name="Horizontal_20_Line"/>
      <text:h text:style-name="Heading_20_1" text:outline-level="1"><text:span text:style-name="Source_20_Text">Depends</text:span></text:h>
      <text:section text:style-name="Sect1" text:name="Section39">
        <text:p text:style-name="P3"><text:bookmark text:name="code-block-viewer38"/><text:span text:style-name="Source_20_Text">Depends</text:span></text:p>
      </text:section>
      <text:p text:style-name="Text_20_body">Purpose:<text:line-break/>Injects dependencies like:</text:p>
      <text:list xml:id="list2147425777" text:style-name="L23">
        <text:list-item>
          <text:p text:style-name="P52"><text:soft-page-break/>database session </text:p>
        </text:list-item>
      </text:list>
      <text:p text:style-name="Horizontal_20_Line"/>
      <text:h text:style-name="Heading_20_1" text:outline-level="1"><text:span text:style-name="Source_20_Text">HTTPException</text:span></text:h>
      <text:section text:style-name="Sect1" text:name="Section40">
        <text:p text:style-name="P3"><text:bookmark text:name="code-block-viewer39"/><text:span text:style-name="Source_20_Text">HTTPException</text:span></text:p>
      </text:section>
      <text:p text:style-name="Text_20_body">Purpose:<text:line-break/>Returns API errors properly.</text:p>
      <text:p text:style-name="Text_20_body">Example:</text:p>
      <text:section text:style-name="Sect1" text:name="Section41">
        <text:p text:style-name="Preformatted_20_Text"><text:bookmark text:name="code-block-viewer40"/><text:span text:style-name="Source_20_Text">401 Unauthorized</text:span></text:p>
        <text:p text:style-name="P3"><text:span text:style-name="Source_20_Text">400 Bad Request</text:span></text:p>
      </text:section>
      <text:p text:style-name="Horizontal_20_Line"/>
      <text:h text:style-name="Heading_20_1" text:outline-level="1">REGISTER API FLOW</text:h>
      <text:section text:style-name="Sect1" text:name="Section42">
        <text:p text:style-name="Preformatted_20_Text"><text:bookmark text:name="code-block-viewer41"/><text:span text:style-name="Source_20_Text">User submits data</text:span></text:p>
        <text:p text:style-name="Preformatted_20_Text"><text:span text:style-name="Source_20_Text"><text:s text:c="6"/>↓</text:span></text:p>
        <text:p text:style-name="Preformatted_20_Text"><text:span text:style-name="Source_20_Text">Pydantic validates input</text:span></text:p>
        <text:p text:style-name="Preformatted_20_Text"><text:span text:style-name="Source_20_Text"><text:s text:c="6"/>↓</text:span></text:p>
        <text:p text:style-name="Preformatted_20_Text"><text:span text:style-name="Source_20_Text">Check existing user</text:span></text:p>
        <text:p text:style-name="Preformatted_20_Text"><text:span text:style-name="Source_20_Text"><text:s text:c="6"/>↓</text:span></text:p>
        <text:p text:style-name="Preformatted_20_Text"><text:span text:style-name="Source_20_Text">Hash password</text:span></text:p>
        <text:p text:style-name="Preformatted_20_Text"><text:span text:style-name="Source_20_Text"><text:s text:c="6"/>↓</text:span></text:p>
        <text:p text:style-name="Preformatted_20_Text"><text:span text:style-name="Source_20_Text">Store in PostgreSQL</text:span></text:p>
        <text:p text:style-name="Preformatted_20_Text"><text:span text:style-name="Source_20_Text"><text:s text:c="6"/>↓</text:span></text:p>
        <text:p text:style-name="P3"><text:span text:style-name="Source_20_Text">Success response</text:span></text:p>
      </text:section>
      <text:p text:style-name="Horizontal_20_Line"/>
      <text:h text:style-name="Heading_20_1" text:outline-level="1">LOGIN API FLOW</text:h>
      <text:section text:style-name="Sect1" text:name="Section43">
        <text:p text:style-name="Preformatted_20_Text"><text:bookmark text:name="code-block-viewer42"/><text:span text:style-name="Source_20_Text">User login request</text:span></text:p>
        <text:p text:style-name="Preformatted_20_Text"><text:span text:style-name="Source_20_Text"><text:s text:c="6"/>↓</text:span></text:p>
        <text:p text:style-name="Preformatted_20_Text"><text:span text:style-name="Source_20_Text">Fetch user from DB</text:span></text:p>
        <text:p text:style-name="Preformatted_20_Text"><text:span text:style-name="Source_20_Text"><text:s text:c="6"/>↓</text:span></text:p>
        <text:p text:style-name="Preformatted_20_Text"><text:span text:style-name="Source_20_Text">Verify password</text:span></text:p>
        <text:p text:style-name="Preformatted_20_Text"><text:span text:style-name="Source_20_Text"><text:s text:c="6"/>↓</text:span></text:p>
        <text:p text:style-name="Preformatted_20_Text"><text:span text:style-name="Source_20_Text">Generate JWT token</text:span></text:p>
        <text:p text:style-name="Preformatted_20_Text"><text:span text:style-name="Source_20_Text"><text:s text:c="6"/>↓</text:span></text:p>
        <text:p text:style-name="P3"><text:span text:style-name="Source_20_Text">Return token</text:span></text:p>
      </text:section>
      <text:p text:style-name="Horizontal_20_Line"/>
      <text:h text:style-name="Heading_20_1" text:outline-level="1">9. PROTECTED ROUTES</text:h>
      <text:p text:style-name="Text_20_body">File:</text:p>
      <text:section text:style-name="Sect1" text:name="Section44">
        <text:p text:style-name="P3"><text:bookmark text:name="code-block-viewer43"/><text:span text:style-name="Source_20_Text">app/api/protected.py</text:span></text:p>
      </text:section>
      <text:p text:style-name="Horizontal_20_Line"/>
      <text:h text:style-name="Heading_20_1" text:outline-level="1"><text:soft-page-break/>Purpose</text:h>
      <text:p text:style-name="Text_20_body">Creates APIs that later require authentication.</text:p>
      <text:p text:style-name="Text_20_body">Foundation for:</text:p>
      <text:list xml:id="list842047038" text:style-name="L24">
        <text:list-item>
          <text:p text:style-name="P54">admin panel </text:p>
        </text:list-item>
        <text:list-item>
          <text:p text:style-name="P54">dashboards </text:p>
        </text:list-item>
        <text:list-item>
          <text:p text:style-name="P53">monitoring APIs </text:p>
        </text:list-item>
      </text:list>
      <text:p text:style-name="Horizontal_20_Line"/>
      <text:h text:style-name="Heading_20_1" text:outline-level="1">10. THREAT MODEL &amp; THREAT API</text:h>
      <text:p text:style-name="Text_20_body">Files:</text:p>
      <text:section text:style-name="Sect1" text:name="Section45">
        <text:p text:style-name="Preformatted_20_Text"><text:bookmark text:name="code-block-viewer44"/><text:span text:style-name="Source_20_Text">app/models/threat.py</text:span></text:p>
        <text:p text:style-name="P3"><text:span text:style-name="Source_20_Text">app/api/threats.py</text:span></text:p>
      </text:section>
      <text:p text:style-name="Horizontal_20_Line"/>
      <text:h text:style-name="Heading_20_1" text:outline-level="1">Purpose</text:h>
      <text:p text:style-name="Text_20_body">Prepares system for:</text:p>
      <text:list xml:id="list117163765" text:style-name="L25">
        <text:list-item>
          <text:p text:style-name="P56">Falco alerts </text:p>
        </text:list-item>
        <text:list-item>
          <text:p text:style-name="P56">Tetragon alerts </text:p>
        </text:list-item>
        <text:list-item>
          <text:p text:style-name="P56">runtime events </text:p>
        </text:list-item>
        <text:list-item>
          <text:p text:style-name="P55">AI analysis </text:p>
        </text:list-item>
      </text:list>
      <text:p text:style-name="Horizontal_20_Line"/>
      <text:h text:style-name="Heading_20_1" text:outline-level="1">Why Important</text:h>
      <text:p text:style-name="Text_20_body">This becomes:</text:p>
      <text:h text:style-name="Heading_20_1" text:outline-level="1">Security Intelligence Layer</text:h>
      <text:p text:style-name="Text_20_body">of KavachOps.</text:p>
      <text:p text:style-name="Horizontal_20_Line"/>
      <text:h text:style-name="Heading_20_1" text:outline-level="1">11. AI SERVICE FOUNDATION</text:h>
      <text:p text:style-name="Text_20_body">File:</text:p>
      <text:section text:style-name="Sect1" text:name="Section46">
        <text:p text:style-name="P3"><text:bookmark text:name="code-block-viewer45"/><text:span text:style-name="Source_20_Text">app/services/ai/ai_engine.py</text:span></text:p>
      </text:section>
      <text:p text:style-name="Horizontal_20_Line"/>
      <text:h text:style-name="Heading_20_1" text:outline-level="1"><text:soft-page-break/>Purpose</text:h>
      <text:p text:style-name="Text_20_body">Prepares future AI integration layer.</text:p>
      <text:p text:style-name="Text_20_body">Future integrations:</text:p>
      <text:list xml:id="list918466867" text:style-name="L26">
        <text:list-item>
          <text:p text:style-name="P58">Ollama </text:p>
        </text:list-item>
        <text:list-item>
          <text:p text:style-name="P58">LLMs </text:p>
        </text:list-item>
        <text:list-item>
          <text:p text:style-name="P58">log analysis </text:p>
        </text:list-item>
        <text:list-item>
          <text:p text:style-name="P58">threat classification </text:p>
        </text:list-item>
        <text:list-item>
          <text:p text:style-name="P57">incident summaries </text:p>
        </text:list-item>
      </text:list>
      <text:p text:style-name="Horizontal_20_Line"/>
      <text:h text:style-name="Heading_20_1" text:outline-level="1">Why AI Layer Important</text:h>
      <text:p text:style-name="Text_20_body">This becomes:</text:p>
      <text:h text:style-name="Heading_20_1" text:outline-level="1">unique USP of KavachOps.</text:h>
      <text:p text:style-name="Text_20_body">Very few projects combine:</text:p>
      <text:list xml:id="list3664067302" text:style-name="L27">
        <text:list-item>
          <text:p text:style-name="P60">DevSecOps </text:p>
        </text:list-item>
        <text:list-item>
          <text:p text:style-name="P60">AI </text:p>
        </text:list-item>
        <text:list-item>
          <text:p text:style-name="P59">runtime security </text:p>
        </text:list-item>
      </text:list>
      <text:p text:style-name="Text_20_body">together.</text:p>
      <text:p text:style-name="Horizontal_20_Line"/>
      <text:h text:style-name="Heading_20_1" text:outline-level="1">ENTERPRISE ARCHITECTURE ACHIEVED IN PHASE 2</text:h>
      <text:section text:style-name="Sect1" text:name="Section47">
        <text:p text:style-name="Preformatted_20_Text"><text:bookmark text:name="code-block-viewer46"/><text:span text:style-name="Source_20_Text">✔ Modular backend</text:span></text:p>
        <text:p text:style-name="Preformatted_20_Text"><text:span text:style-name="Source_20_Text">✔ Authentication architecture</text:span></text:p>
        <text:p text:style-name="Preformatted_20_Text"><text:span text:style-name="Source_20_Text">✔ ORM architecture</text:span></text:p>
        <text:p text:style-name="Preformatted_20_Text"><text:span text:style-name="Source_20_Text">✔ Database abstraction</text:span></text:p>
        <text:p text:style-name="Preformatted_20_Text"><text:span text:style-name="Source_20_Text">✔ Secure password storage</text:span></text:p>
        <text:p text:style-name="Preformatted_20_Text"><text:span text:style-name="Source_20_Text">✔ Token-based authentication</text:span></text:p>
        <text:p text:style-name="Preformatted_20_Text"><text:span text:style-name="Source_20_Text">✔ API validation</text:span></text:p>
        <text:p text:style-name="Preformatted_20_Text"><text:span text:style-name="Source_20_Text">✔ Threat intelligence structure</text:span></text:p>
        <text:p text:style-name="Preformatted_20_Text"><text:span text:style-name="Source_20_Text">✔ AI integration foundation</text:span></text:p>
        <text:p text:style-name="P3"><text:span text:style-name="Source_20_Text">✔ Enterprise API design</text:span></text:p>
      </text:section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HASE 3 MAIN OBJECTIVE</text:h>
      <text:section text:style-name="Sect2" text:name="thread">
        <text:p text:style-name="Text_20_body">Convert KavachOps from:</text:p>
        <text:section text:style-name="Sect1" text:name="Section48">
          <text:p text:style-name="P3"><text:bookmark text:name="code-block-viewer47"/><text:span text:style-name="Source_20_Text">backend-only project</text:span></text:p>
        </text:section>
        <text:p text:style-name="Text_20_body">into:</text:p>
        <text:h text:style-name="Heading_20_1" text:outline-level="1">full-stack containerized enterprise application.</text:h>
        <text:p text:style-name="Horizontal_20_Line"/>
        <text:h text:style-name="Heading_20_1" text:outline-level="1">PHASE 3 DIVISION</text:h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Table_20_Heading">Subphase</text:p>
              </table:table-cell>
              <table:table-cell table:style-name="Table3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3.1</text:p>
            </table:table-cell>
            <table:table-cell table:style-name="Table3.A1" office:value-type="string">
              <text:p text:style-name="Table_20_Contents">Enterprise Frontend UI</text:p>
            </table:table-cell>
          </table:table-row>
          <table:table-row>
            <table:table-cell table:style-name="Table3.A1" office:value-type="string">
              <text:p text:style-name="Table_20_Contents">3.2</text:p>
            </table:table-cell>
            <table:table-cell table:style-name="Table3.A1" office:value-type="string">
              <text:p text:style-name="Table_20_Contents">Frontend ↔ Backend Authentication</text:p>
            </table:table-cell>
          </table:table-row>
          <table:table-row>
            <table:table-cell table:style-name="Table3.A1" office:value-type="string">
              <text:p text:style-name="Table_20_Contents">3.3</text:p>
            </table:table-cell>
            <table:table-cell table:style-name="Table3.A1" office:value-type="string">
              <text:p text:style-name="Table_20_Contents">Dockerized Multi-Container Architecture</text:p>
            </table:table-cell>
          </table:table-row>
        </table:table>
        <text:p text:style-name="Horizontal_20_Line"/>
        <text:h text:style-name="Heading_20_1" text:outline-level="1">PHASE 3.1 — ENTERPRISE FRONTEND DEVELOPMENT</text:h>
        <text:h text:style-name="Heading_20_1" text:outline-level="1">MAIN GOAL</text:h>
        <text:p text:style-name="Text_20_body">Create:</text:p>
        <text:h text:style-name="Heading_20_1" text:outline-level="1">professional security dashboard UI.</text:h>
        <text:p text:style-name="Text_20_body">Not just:</text:p>
        <text:section text:style-name="Sect1" text:name="Section49">
          <text:p text:style-name="P3"><text:bookmark text:name="code-block-viewer48"/><text:span text:style-name="Source_20_Text">simple React page</text:span></text:p>
        </text:section>
        <text:p text:style-name="Text_20_body">but:</text:p>
        <text:section text:style-name="Sect1" text:name="Section50">
          <text:p text:style-name="P3"><text:bookmark text:name="code-block-viewer49"/><text:span text:style-name="Source_20_Text">enterprise-grade cyber-security dashboard</text:span></text:p>
        </text:section>
        <text:p text:style-name="Horizontal_20_Line"/>
        <text:h text:style-name="Heading_20_1" text:outline-level="1">TECHNOLOGIES USED</text:h>
        <table:table table:name="Table4" table:style-name="Table4">
          <table:table-column table:style-name="Table4.A"/>
          <table:table-column table:style-name="Table4.B"/>
          <table:table-header-rows>
            <table:table-row>
              <table:table-cell table:style-name="Table4.A1" office:value-type="string">
                <text:p text:style-name="Table_20_Heading">Technology</text:p>
              </table:table-cell>
              <table:table-cell table:style-name="Table4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React</text:p>
            </table:table-cell>
            <table:table-cell table:style-name="Table4.A1" office:value-type="string">
              <text:p text:style-name="Table_20_Contents">frontend framework</text:p>
            </table:table-cell>
          </table:table-row>
          <table:table-row>
            <table:table-cell table:style-name="Table4.A1" office:value-type="string">
              <text:p text:style-name="Table_20_Contents">Axios</text:p>
            </table:table-cell>
            <table:table-cell table:style-name="Table4.A1" office:value-type="string">
              <text:p text:style-name="Table_20_Contents">API communication</text:p>
            </table:table-cell>
          </table:table-row>
          <table:table-row>
            <table:table-cell table:style-name="Table4.A1" office:value-type="string">
              <text:p text:style-name="Table_20_Contents">React Icons</text:p>
            </table:table-cell>
            <table:table-cell table:style-name="Table4.A1" office:value-type="string">
              <text:p text:style-name="Table_20_Contents">dashboard icons</text:p>
            </table:table-cell>
          </table:table-row>
          <text:soft-page-break/>
          <table:table-row>
            <table:table-cell table:style-name="Table4.A1" office:value-type="string">
              <text:p text:style-name="Table_20_Contents">CSS-in-JS</text:p>
            </table:table-cell>
            <table:table-cell table:style-name="Table4.A1" office:value-type="string">
              <text:p text:style-name="Table_20_Contents">custom styling</text:p>
            </table:table-cell>
          </table:table-row>
          <table:table-row>
            <table:table-cell table:style-name="Table4.A1" office:value-type="string">
              <text:p text:style-name="Table_20_Contents">Google Fonts</text:p>
            </table:table-cell>
            <table:table-cell table:style-name="Table4.A1" office:value-type="string">
              <text:p text:style-name="Table_20_Contents">enterprise typography</text:p>
            </table:table-cell>
          </table:table-row>
        </table:table>
        <text:p text:style-name="Horizontal_20_Line"/>
        <text:h text:style-name="Heading_20_1" text:outline-level="1">FRONTEND STRUCTURE CREATED</text:h>
        <text:section text:style-name="Sect1" text:name="Section51">
          <text:p text:style-name="Preformatted_20_Text"><text:bookmark text:name="code-block-viewer50"/><text:span text:style-name="Source_20_Text">frontend/src/</text:span></text:p>
          <text:p text:style-name="Preformatted_20_Text"><text:span text:style-name="Source_20_Text">├── api/</text:span></text:p>
          <text:p text:style-name="Preformatted_20_Text"><text:span text:style-name="Source_20_Text">├── assets/</text:span></text:p>
          <text:p text:style-name="Preformatted_20_Text"><text:span text:style-name="Source_20_Text">├── components/</text:span></text:p>
          <text:p text:style-name="Preformatted_20_Text"><text:span text:style-name="Source_20_Text">├── layouts/</text:span></text:p>
          <text:p text:style-name="Preformatted_20_Text"><text:span text:style-name="Source_20_Text">├── pages/</text:span></text:p>
          <text:p text:style-name="P3"><text:span text:style-name="Source_20_Text">├── styles/</text:span></text:p>
        </text:section>
        <text:p text:style-name="Text_20_body">This structure follows:</text:p>
        <text:h text:style-name="Heading_20_1" text:outline-level="1">enterprise frontend architecture.</text:h>
        <text:p text:style-name="Horizontal_20_Line"/>
        <text:h text:style-name="Heading_20_1" text:outline-level="1">ENTERPRISE UI FEATURES IMPLEMENTED</text:h>
        <text:p text:style-name="Horizontal_20_Line"/>
        <text:h text:style-name="Heading_20_1" text:outline-level="1">1. Cyber-Security Dashboard UI</text:h>
        <text:p text:style-name="Text_20_body">Created:</text:p>
        <text:section text:style-name="Sect1" text:name="Section52">
          <text:p text:style-name="Preformatted_20_Text"><text:bookmark text:name="code-block-viewer51"/><text:span text:style-name="Source_20_Text">✔ sidebar navigation</text:span></text:p>
          <text:p text:style-name="Preformatted_20_Text"><text:span text:style-name="Source_20_Text">✔ dashboard cards</text:span></text:p>
          <text:p text:style-name="Preformatted_20_Text"><text:span text:style-name="Source_20_Text">✔ alert panels</text:span></text:p>
          <text:p text:style-name="Preformatted_20_Text"><text:span text:style-name="Source_20_Text">✔ monitoring sections</text:span></text:p>
          <text:p text:style-name="P3"><text:span text:style-name="Source_20_Text">✔ enterprise layout</text:span></text:p>
        </text:section>
        <text:p text:style-name="Text_20_body">Inspired by:</text:p>
        <text:list xml:id="list2768893480" text:style-name="L28">
          <text:list-item>
            <text:p text:style-name="P62">Grafana </text:p>
          </text:list-item>
          <text:list-item>
            <text:p text:style-name="P62">Datadog </text:p>
          </text:list-item>
          <text:list-item>
            <text:p text:style-name="P62">Splunk </text:p>
          </text:list-item>
          <text:list-item>
            <text:p text:style-name="P61">SOC dashboards </text:p>
          </text:list-item>
        </text:list>
        <text:p text:style-name="Horizontal_20_Line"/>
        <text:h text:style-name="Heading_20_1" text:outline-level="1">2. Custom Branding</text:h>
        <text:p text:style-name="Text_20_body">Created:</text:p>
        <text:h text:style-name="Heading_20_1" text:outline-level="1"><text:soft-page-break/>KavachOps identity.</text:h>
        <text:p text:style-name="Text_20_body">Implemented:</text:p>
        <text:section text:style-name="Sect1" text:name="Section53">
          <text:p text:style-name="Preformatted_20_Text"><text:bookmark text:name="code-block-viewer52"/><text:span text:style-name="Source_20_Text">✔ custom logo</text:span></text:p>
          <text:p text:style-name="Preformatted_20_Text"><text:span text:style-name="Source_20_Text">✔ Orbitron font</text:span></text:p>
          <text:p text:style-name="Preformatted_20_Text"><text:span text:style-name="Source_20_Text">✔ cyber-security theme</text:span></text:p>
          <text:p text:style-name="P3"><text:span text:style-name="Source_20_Text">✔ futuristic branding</text:span></text:p>
        </text:section>
        <text:p text:style-name="Text_20_body">This gave:</text:p>
        <text:section text:style-name="Sect1" text:name="Section54">
          <text:p text:style-name="P3"><text:bookmark text:name="code-block-viewer53"/><text:span text:style-name="Source_20_Text">real SaaS product feel</text:span></text:p>
        </text:section>
        <text:p text:style-name="Text_20_body">instead of:</text:p>
        <text:section text:style-name="Sect1" text:name="Section55">
          <text:p text:style-name="P3"><text:bookmark text:name="code-block-viewer54"/><text:span text:style-name="Source_20_Text">college project feel</text:span></text:p>
        </text:section>
        <text:p text:style-name="Horizontal_20_Line"/>
        <text:h text:style-name="Heading_20_1" text:outline-level="1">3. Responsive UI</text:h>
        <text:p text:style-name="Text_20_body">Implemented:</text:p>
        <text:section text:style-name="Sect1" text:name="Section56">
          <text:p text:style-name="Preformatted_20_Text"><text:bookmark text:name="code-block-viewer55"/><text:span text:style-name="Source_20_Text">✔ adaptive layouts</text:span></text:p>
          <text:p text:style-name="Preformatted_20_Text"><text:span text:style-name="Source_20_Text">✔ responsive cards</text:span></text:p>
          <text:p text:style-name="Preformatted_20_Text"><text:span text:style-name="Source_20_Text">✔ scalable dashboard structure</text:span></text:p>
          <text:p text:style-name="P3"><text:span text:style-name="Source_20_Text">✔ mobile-friendly foundation</text:span></text:p>
        </text:section>
        <text:p text:style-name="Horizontal_20_Line"/>
        <text:h text:style-name="Heading_20_1" text:outline-level="1">4. Glassmorphism + Modern UI</text:h>
        <text:p text:style-name="Text_20_body">Implemented:</text:p>
        <text:section text:style-name="Sect1" text:name="Section57">
          <text:p text:style-name="Preformatted_20_Text"><text:bookmark text:name="code-block-viewer56"/><text:span text:style-name="Source_20_Text">✔ blur effects</text:span></text:p>
          <text:p text:style-name="Preformatted_20_Text"><text:span text:style-name="Source_20_Text">✔ dark gradients</text:span></text:p>
          <text:p text:style-name="Preformatted_20_Text"><text:span text:style-name="Source_20_Text">✔ soft shadows</text:span></text:p>
          <text:p text:style-name="Preformatted_20_Text"><text:span text:style-name="Source_20_Text">✔ glowing cards</text:span></text:p>
          <text:p text:style-name="P3"><text:span text:style-name="Source_20_Text">✔ premium enterprise feel</text:span></text:p>
        </text:section>
        <text:p text:style-name="Horizontal_20_Line"/>
        <text:h text:style-name="Heading_20_1" text:outline-level="1">5. Interactive UX</text:h>
        <text:p text:style-name="Text_20_body">Added:</text:p>
        <text:section text:style-name="Sect1" text:name="Section58">
          <text:p text:style-name="Preformatted_20_Text"><text:bookmark text:name="code-block-viewer57"/><text:span text:style-name="Source_20_Text">✔ hover effects</text:span></text:p>
          <text:p text:style-name="Preformatted_20_Text"><text:span text:style-name="Source_20_Text">✔ active navigation</text:span></text:p>
          <text:p text:style-name="Preformatted_20_Text"><text:span text:style-name="Source_20_Text">✔ transitions</text:span></text:p>
          <text:p text:style-name="P3"><text:span text:style-name="Source_20_Text">✔ dynamic styling</text:span></text:p>
        </text:section>
        <text:p text:style-name="Text_20_body">Important because:<text:line-break/>enterprise dashboards must feel:</text:p>
        <text:h text:style-name="Heading_20_1" text:outline-level="1"><text:soft-page-break/>interactive and alive.</text:h>
        <text:p text:style-name="Horizontal_20_Line"/>
        <text:h text:style-name="Heading_20_1" text:outline-level="1">WHAT YOU LEARNED IN 3.1</text:h>
        <text:section text:style-name="Sect1" text:name="Section59">
          <text:p text:style-name="Preformatted_20_Text"><text:bookmark text:name="code-block-viewer58"/><text:span text:style-name="Source_20_Text">✔ React architecture</text:span></text:p>
          <text:p text:style-name="Preformatted_20_Text"><text:span text:style-name="Source_20_Text">✔ component structure</text:span></text:p>
          <text:p text:style-name="Preformatted_20_Text"><text:span text:style-name="Source_20_Text">✔ enterprise UI design</text:span></text:p>
          <text:p text:style-name="Preformatted_20_Text"><text:span text:style-name="Source_20_Text">✔ responsive layouts</text:span></text:p>
          <text:p text:style-name="Preformatted_20_Text"><text:span text:style-name="Source_20_Text">✔ dashboard design patterns</text:span></text:p>
          <text:p text:style-name="P3"><text:span text:style-name="Source_20_Text">✔ modern frontend organization</text:span></text:p>
        </text:section>
        <text:p text:style-name="Horizontal_20_Line"/>
        <text:h text:style-name="Heading_20_1" text:outline-level="1">PHASE 3.2 — AUTHENTICATION FLOW &amp; API INTEGRATION</text:h>
        <text:p text:style-name="Text_20_body">This was:</text:p>
        <text:h text:style-name="Heading_20_1" text:outline-level="1">actual enterprise application logic phase.</text:h>
        <text:p text:style-name="Horizontal_20_Line"/>
        <text:h text:style-name="Heading_20_1" text:outline-level="1">MAIN GOAL</text:h>
        <text:p text:style-name="Text_20_body">Connect:</text:p>
        <text:section text:style-name="Sect1" text:name="Section60">
          <text:p text:style-name="P3"><text:bookmark text:name="code-block-viewer59"/><text:span text:style-name="Source_20_Text">frontend ↔ backend</text:span></text:p>
        </text:section>
        <text:p text:style-name="Text_20_body">using:</text:p>
        <text:h text:style-name="Heading_20_1" text:outline-level="1">secure authentication architecture.</text:h>
        <text:p text:style-name="Horizontal_20_Line"/>
        <text:h text:style-name="Heading_20_1" text:outline-level="1">ENTERPRISE AUTH FLOW IMPLEMENTED</text:h>
        <text:section text:style-name="Sect1" text:name="Section61">
          <text:p text:style-name="Preformatted_20_Text"><text:bookmark text:name="code-block-viewer60"/><text:span text:style-name="Source_20_Text">User Login</text:span></text:p>
          <text:p text:style-name="Preformatted_20_Text"><text:span text:style-name="Source_20_Text"><text:s text:c="5"/>↓</text:span></text:p>
          <text:p text:style-name="Preformatted_20_Text"><text:span text:style-name="Source_20_Text">React sends API request</text:span></text:p>
          <text:p text:style-name="Preformatted_20_Text"><text:span text:style-name="Source_20_Text"><text:s text:c="5"/>↓</text:span></text:p>
          <text:p text:style-name="Preformatted_20_Text"><text:span text:style-name="Source_20_Text">FastAPI validates credentials</text:span></text:p>
          <text:p text:style-name="Preformatted_20_Text"><text:span text:style-name="Source_20_Text"><text:s text:c="5"/>↓</text:span></text:p>
          <text:p text:style-name="Preformatted_20_Text"><text:span text:style-name="Source_20_Text">JWT token generated</text:span></text:p>
          <text:p text:style-name="Preformatted_20_Text"><text:span text:style-name="Source_20_Text"><text:s text:c="5"/>↓</text:span></text:p>
          <text:p text:style-name="Preformatted_20_Text"><text:span text:style-name="Source_20_Text">Frontend stores token</text:span></text:p>
          <text:p text:style-name="Preformatted_20_Text"><text:soft-page-break/><text:span text:style-name="Source_20_Text"><text:s text:c="5"/>↓</text:span></text:p>
          <text:p text:style-name="P3"><text:span text:style-name="Source_20_Text">Protected dashboard access</text:span></text:p>
        </text:section>
        <text:p text:style-name="Text_20_body">This is EXACTLY how:</text:p>
        <text:list xml:id="list3176639213" text:style-name="L29">
          <text:list-item>
            <text:p text:style-name="P64">banking apps </text:p>
          </text:list-item>
          <text:list-item>
            <text:p text:style-name="P64">SaaS apps </text:p>
          </text:list-item>
          <text:list-item>
            <text:p text:style-name="P64">cloud platforms </text:p>
          </text:list-item>
          <text:list-item>
            <text:p text:style-name="P63">enterprise portals </text:p>
          </text:list-item>
        </text:list>
        <text:p text:style-name="Text_20_body">authenticate users.</text:p>
        <text:p text:style-name="Horizontal_20_Line"/>
        <text:h text:style-name="Heading_20_1" text:outline-level="1">TECHNOLOGIES USED</text:h>
        <table:table table:name="Table5" table:style-name="Table5">
          <table:table-column table:style-name="Table5.A"/>
          <table:table-column table:style-name="Table5.B"/>
          <table:table-header-rows>
            <table:table-row>
              <table:table-cell table:style-name="Table5.A1" office:value-type="string">
                <text:p text:style-name="Table_20_Heading">Technology</text:p>
              </table:table-cell>
              <table:table-cell table:style-name="Table5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Axios</text:p>
            </table:table-cell>
            <table:table-cell table:style-name="Table5.A1" office:value-type="string">
              <text:p text:style-name="Table_20_Contents">API requests</text:p>
            </table:table-cell>
          </table:table-row>
          <table:table-row>
            <table:table-cell table:style-name="Table5.A1" office:value-type="string">
              <text:p text:style-name="Table_20_Contents">JWT</text:p>
            </table:table-cell>
            <table:table-cell table:style-name="Table5.A1" office:value-type="string">
              <text:p text:style-name="Table_20_Contents">authentication</text:p>
            </table:table-cell>
          </table:table-row>
          <table:table-row>
            <table:table-cell table:style-name="Table5.A1" office:value-type="string">
              <text:p text:style-name="Table_20_Contents">FastAPI</text:p>
            </table:table-cell>
            <table:table-cell table:style-name="Table5.A1" office:value-type="string">
              <text:p text:style-name="Table_20_Contents">backend APIs</text:p>
            </table:table-cell>
          </table:table-row>
          <table:table-row>
            <table:table-cell table:style-name="Table5.A1" office:value-type="string">
              <text:p text:style-name="Table_20_Contents">PostgreSQL</text:p>
            </table:table-cell>
            <table:table-cell table:style-name="Table5.A1" office:value-type="string">
              <text:p text:style-name="Table_20_Contents">user storage</text:p>
            </table:table-cell>
          </table:table-row>
          <table:table-row>
            <table:table-cell table:style-name="Table5.A1" office:value-type="string">
              <text:p text:style-name="Table_20_Contents">localStorage</text:p>
            </table:table-cell>
            <table:table-cell table:style-name="Table5.A1" office:value-type="string">
              <text:p text:style-name="Table_20_Contents">token persistence</text:p>
            </table:table-cell>
          </table:table-row>
        </table:table>
        <text:p text:style-name="Horizontal_20_Line"/>
        <text:h text:style-name="Heading_20_1" text:outline-level="1">IMPORTANT FILES CREATED</text:h>
        <table:table table:name="Table6" table:style-name="Table6">
          <table:table-column table:style-name="Table6.A"/>
          <table:table-column table:style-name="Table6.B"/>
          <table:table-header-rows>
            <table:table-row>
              <table:table-cell table:style-name="Table6.A1" office:value-type="string">
                <text:p text:style-name="Table_20_Heading">File</text:p>
              </table:table-cell>
              <table:table-cell table:style-name="Table6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api.js</text:p>
            </table:table-cell>
            <table:table-cell table:style-name="Table6.A1" office:value-type="string">
              <text:p text:style-name="Table_20_Contents">centralized API client</text:p>
            </table:table-cell>
          </table:table-row>
          <table:table-row>
            <table:table-cell table:style-name="Table6.A1" office:value-type="string">
              <text:p text:style-name="Table_20_Contents">Login.jsx</text:p>
            </table:table-cell>
            <table:table-cell table:style-name="Table6.A1" office:value-type="string">
              <text:p text:style-name="Table_20_Contents">authentication UI</text:p>
            </table:table-cell>
          </table:table-row>
          <table:table-row>
            <table:table-cell table:style-name="Table6.A1" office:value-type="string">
              <text:p text:style-name="Table_20_Contents">App.js</text:p>
            </table:table-cell>
            <table:table-cell table:style-name="Table6.A1" office:value-type="string">
              <text:p text:style-name="Table_20_Contents">protected routing logic</text:p>
            </table:table-cell>
          </table:table-row>
        </table:table>
        <text:p text:style-name="Horizontal_20_Line"/>
        <text:h text:style-name="Heading_20_1" text:outline-level="1">JWT TOKEN ARCHITECTURE</text:h>
        <text:p text:style-name="Text_20_body">Implemented:</text:p>
        <text:section text:style-name="Sect1" text:name="Section62">
          <text:p text:style-name="Preformatted_20_Text"><text:bookmark text:name="code-block-viewer61"/><text:span text:style-name="Source_20_Text">✔ token generation</text:span></text:p>
          <text:p text:style-name="Preformatted_20_Text"><text:span text:style-name="Source_20_Text">✔ token storage</text:span></text:p>
          <text:p text:style-name="Preformatted_20_Text"><text:span text:style-name="Source_20_Text">✔ authenticated sessions</text:span></text:p>
          <text:p text:style-name="P3"><text:span text:style-name="Source_20_Text">✔ protected frontend access</text:span></text:p>
        </text:section>
        <text:p text:style-name="Horizontal_20_Line"/>
        <text:h text:style-name="Heading_20_1" text:outline-level="1">ENTERPRISE CONCEPTS LEARNED</text:h>
        <text:p text:style-name="Horizontal_20_Line"/>
        <text:h text:style-name="Heading_20_1" text:outline-level="1"><text:soft-page-break/>1. API-Based Authentication</text:h>
        <text:p text:style-name="Text_20_body">Instead of:</text:p>
        <text:section text:style-name="Sect1" text:name="Section63">
          <text:p text:style-name="P3"><text:bookmark text:name="code-block-viewer62"/><text:span text:style-name="Source_20_Text">traditional server rendering</text:span></text:p>
        </text:section>
        <text:p text:style-name="Text_20_body">frontend communicates with backend APIs.</text:p>
        <text:p text:style-name="Text_20_body">Modern enterprise standard.</text:p>
        <text:p text:style-name="Horizontal_20_Line"/>
        <text:h text:style-name="Heading_20_1" text:outline-level="1">2. JWT Authentication</text:h>
        <text:p text:style-name="Text_20_body">Implemented:</text:p>
        <text:h text:style-name="Heading_20_1" text:outline-level="1">stateless authentication.</text:h>
        <text:p text:style-name="Text_20_body">Used in:</text:p>
        <text:list xml:id="list2859525015" text:style-name="L30">
          <text:list-item>
            <text:p text:style-name="P66">microservices </text:p>
          </text:list-item>
          <text:list-item>
            <text:p text:style-name="P66">cloud-native apps </text:p>
          </text:list-item>
          <text:list-item>
            <text:p text:style-name="P66">SaaS platforms </text:p>
          </text:list-item>
          <text:list-item>
            <text:p text:style-name="P65">Kubernetes dashboards </text:p>
          </text:list-item>
        </text:list>
        <text:p text:style-name="Horizontal_20_Line"/>
        <text:h text:style-name="Heading_20_1" text:outline-level="1">3. Protected Frontend Routing</text:h>
        <text:p text:style-name="Text_20_body">Frontend checks:</text:p>
        <text:section text:style-name="Sect1" text:name="Section64">
          <text:p text:style-name="P3"><text:bookmark text:name="code-block-viewer63"/><text:span text:style-name="Source_20_Text">is token present?</text:span></text:p>
        </text:section>
        <text:p text:style-name="Text_20_body">If:</text:p>
        <text:section text:style-name="Sect1" text:name="Section65">
          <text:p text:style-name="Preformatted_20_Text"><text:bookmark text:name="code-block-viewer64"/><text:span text:style-name="Source_20_Text">YES → dashboard</text:span></text:p>
          <text:p text:style-name="P3"><text:span text:style-name="Source_20_Text">NO → login page</text:span></text:p>
        </text:section>
        <text:p text:style-name="Text_20_body">Real-world application behavior.</text:p>
        <text:p text:style-name="Horizontal_20_Line"/>
        <text:h text:style-name="Heading_20_1" text:outline-level="1">4. CORS Architecture</text:h>
        <text:p text:style-name="Text_20_body">Implemented:</text:p>
        <text:h text:style-name="Heading_20_1" text:outline-level="1">Cross-Origin Resource Sharing.</text:h>
        <text:p text:style-name="Text_20_body">Because:</text:p>
        <text:section text:style-name="Sect1" text:name="Section66">
          <text:p text:style-name="Preformatted_20_Text"><text:bookmark text:name="code-block-viewer65"/><text:span text:style-name="Source_20_Text">frontend → localhost:3000</text:span></text:p>
          <text:p text:style-name="P3"><text:soft-page-break/><text:span text:style-name="Source_20_Text">backend → localhost:8000</text:span></text:p>
        </text:section>
        <text:p text:style-name="Text_20_body">Browser blocks requests unless backend allows them.</text:p>
        <text:p text:style-name="Text_20_body">This is:</text:p>
        <text:h text:style-name="Heading_20_1" text:outline-level="1">critical enterprise security concept.</text:h>
        <text:p text:style-name="Horizontal_20_Line"/>
        <text:h text:style-name="Heading_20_1" text:outline-level="1">5. Modular FastAPI Architecture</text:h>
        <text:p text:style-name="Text_20_body">Learned:</text:p>
        <text:section text:style-name="Sect1" text:name="Section67">
          <text:p text:style-name="Preformatted_20_Text"><text:bookmark text:name="code-block-viewer66"/><text:span text:style-name="Source_20_Text">main.py</text:span></text:p>
          <text:p text:style-name="Preformatted_20_Text"><text:span text:style-name="Source_20_Text"><text:s text:c="3"/>↓</text:span></text:p>
          <text:p text:style-name="Preformatted_20_Text"><text:span text:style-name="Source_20_Text">router inclusion</text:span></text:p>
          <text:p text:style-name="Preformatted_20_Text"><text:span text:style-name="Source_20_Text"><text:s text:c="3"/>↓</text:span></text:p>
          <text:p text:style-name="P3"><text:span text:style-name="Source_20_Text">API exposure</text:span></text:p>
        </text:section>
        <text:p text:style-name="Text_20_body">This is:</text:p>
        <text:h text:style-name="Heading_20_1" text:outline-level="1">enterprise backend organization pattern.</text:h>
        <text:p text:style-name="Horizontal_20_Line"/>
        <text:h text:style-name="Heading_20_1" text:outline-level="1">BIGGEST DEBUGGING LESSON</text:h>
        <text:p text:style-name="Text_20_body">You discovered:</text:p>
        <text:section text:style-name="Sect1" text:name="Section68">
          <text:p text:style-name="P3"><text:bookmark text:name="code-block-viewer67"/><text:span text:style-name="Source_20_Text">app.include_router(auth.router)</text:span></text:p>
        </text:section>
        <text:p text:style-name="Text_20_body">was missing.</text:p>
        <text:p text:style-name="Text_20_body">Without it:</text:p>
        <text:section text:style-name="Sect1" text:name="Section69">
          <text:p text:style-name="Preformatted_20_Text"><text:bookmark text:name="code-block-viewer68"/><text:span text:style-name="Source_20_Text">routes existed in file</text:span></text:p>
          <text:p text:style-name="P3"><text:span text:style-name="Source_20_Text">BUT not inside actual app</text:span></text:p>
        </text:section>
        <text:p text:style-name="Text_20_body">This taught:</text:p>
        <text:h text:style-name="Heading_20_1" text:outline-level="1">how modular backend routing works.</text:h>
        <text:p text:style-name="Text_20_body">Very important real engineering concept.</text:p>
        <text:p text:style-name="Horizontal_20_Line"/>
        <text:h text:style-name="Heading_20_1" text:outline-level="1"><text:soft-page-break/>PHASE 3.3 — CONTAINERIZED ENTERPRISE ARCHITECTURE</text:h>
        <text:p text:style-name="Text_20_body">This was:</text:p>
        <text:h text:style-name="Heading_20_1" text:outline-level="1">REAL DevOps foundation phase.</text:h>
        <text:p text:style-name="Horizontal_20_Line"/>
        <text:h text:style-name="Heading_20_1" text:outline-level="1">MAIN GOAL</text:h>
        <text:p text:style-name="Text_20_body">Convert KavachOps into:</text:p>
        <text:h text:style-name="Heading_20_1" text:outline-level="1">multi-container cloud-native application.</text:h>
        <text:p text:style-name="Horizontal_20_Line"/>
        <text:h text:style-name="Heading_20_1" text:outline-level="1">BEFORE 3.3</text:h>
        <text:p text:style-name="Text_20_body">Everything ran manually:</text:p>
        <text:section text:style-name="Sect1" text:name="Section70">
          <text:p text:style-name="Preformatted_20_Text"><text:bookmark text:name="code-block-viewer69"/><text:span text:style-name="Source_20_Text">Frontend → manually</text:span></text:p>
          <text:p text:style-name="Preformatted_20_Text"><text:span text:style-name="Source_20_Text">Backend → manually</text:span></text:p>
          <text:p text:style-name="P3"><text:span text:style-name="Source_20_Text">PostgreSQL → manually</text:span></text:p>
        </text:section>
        <text:p text:style-name="Text_20_body">Not scalable.<text:line-break/>Not enterprise-grade.</text:p>
        <text:p text:style-name="Horizontal_20_Line"/>
        <text:h text:style-name="Heading_20_1" text:outline-level="1">AFTER 3.3</text:h>
        <text:p text:style-name="Text_20_body">Everything becomes:</text:p>
        <text:section text:style-name="Sect1" text:name="Section71">
          <text:p text:style-name="Preformatted_20_Text"><text:bookmark text:name="code-block-viewer70"/><text:span text:style-name="Source_20_Text">Dockerized</text:span></text:p>
          <text:p text:style-name="Preformatted_20_Text"><text:span text:style-name="Source_20_Text">Containerized</text:span></text:p>
          <text:p text:style-name="P3"><text:span text:style-name="Source_20_Text">Orchestrated</text:span></text:p>
        </text:section>
        <text:p text:style-name="Text_20_body">using:</text:p>
        <text:h text:style-name="Heading_20_1" text:outline-level="1">Docker Compose.</text:h>
        <text:p text:style-name="Horizontal_20_Line"/>
        <text:h text:style-name="Heading_20_1" text:outline-level="1">CONTAINER ARCHITECTURE</text:h>
        <text:section text:style-name="Sect1" text:name="Section72">
          <text:p text:style-name="Preformatted_20_Text"><text:bookmark text:name="code-block-viewer71"/><text:span text:style-name="Source_20_Text">Frontend Container</text:span></text:p>
          <text:p text:style-name="Preformatted_20_Text"><text:soft-page-break/><text:span text:style-name="Source_20_Text"><text:s text:c="8"/>↓</text:span></text:p>
          <text:p text:style-name="Preformatted_20_Text"><text:span text:style-name="Source_20_Text">Backend Container</text:span></text:p>
          <text:p text:style-name="Preformatted_20_Text"><text:span text:style-name="Source_20_Text"><text:s text:c="8"/>↓</text:span></text:p>
          <text:p text:style-name="Preformatted_20_Text"><text:span text:style-name="Source_20_Text">PostgreSQL Container</text:span></text:p>
          <text:p text:style-name="Preformatted_20_Text"><text:span text:style-name="Source_20_Text"><text:s text:c="8"/>↓</text:span></text:p>
          <text:p text:style-name="P3"><text:span text:style-name="Source_20_Text">Redis Container (planned)</text:span></text:p>
        </text:section>
        <text:p text:style-name="Horizontal_20_Line"/>
        <text:h text:style-name="Heading_20_1" text:outline-level="1">TECHNOLOGIES USED</text:h>
        <table:table table:name="Table7" table:style-name="Table7">
          <table:table-column table:style-name="Table7.A"/>
          <table:table-column table:style-name="Table7.B"/>
          <table:table-header-rows>
            <table:table-row>
              <table:table-cell table:style-name="Table7.A1" office:value-type="string">
                <text:p text:style-name="Table_20_Heading">Technology</text:p>
              </table:table-cell>
              <table:table-cell table:style-name="Table7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Docker</text:p>
            </table:table-cell>
            <table:table-cell table:style-name="Table7.A1" office:value-type="string">
              <text:p text:style-name="Table_20_Contents">containerization</text:p>
            </table:table-cell>
          </table:table-row>
          <table:table-row>
            <table:table-cell table:style-name="Table7.A1" office:value-type="string">
              <text:p text:style-name="Table_20_Contents">Docker Compose</text:p>
            </table:table-cell>
            <table:table-cell table:style-name="Table7.A1" office:value-type="string">
              <text:p text:style-name="Table_20_Contents">orchestration</text:p>
            </table:table-cell>
          </table:table-row>
          <table:table-row>
            <table:table-cell table:style-name="Table7.A1" office:value-type="string">
              <text:p text:style-name="Table_20_Contents">PostgreSQL Container</text:p>
            </table:table-cell>
            <table:table-cell table:style-name="Table7.A1" office:value-type="string">
              <text:p text:style-name="Table_20_Contents">database</text:p>
            </table:table-cell>
          </table:table-row>
          <table:table-row>
            <table:table-cell table:style-name="Table7.A1" office:value-type="string">
              <text:p text:style-name="Table_20_Contents">Node Container</text:p>
            </table:table-cell>
            <table:table-cell table:style-name="Table7.A1" office:value-type="string">
              <text:p text:style-name="Table_20_Contents">frontend</text:p>
            </table:table-cell>
          </table:table-row>
          <table:table-row>
            <table:table-cell table:style-name="Table7.A1" office:value-type="string">
              <text:p text:style-name="Table_20_Contents">Python Container</text:p>
            </table:table-cell>
            <table:table-cell table:style-name="Table7.A1" office:value-type="string">
              <text:p text:style-name="Table_20_Contents">backend</text:p>
            </table:table-cell>
          </table:table-row>
        </table:table>
        <text:p text:style-name="Horizontal_20_Line"/>
        <text:h text:style-name="Heading_20_1" text:outline-level="1">DOCKERFILES CREATED</text:h>
        <text:p text:style-name="Horizontal_20_Line"/>
        <text:h text:style-name="Heading_20_1" text:outline-level="1">FRONTEND DOCKERFILE</text:h>
        <text:p text:style-name="Text_20_body">Created React container.</text:p>
        <text:p text:style-name="Text_20_body">Responsibilities:</text:p>
        <text:section text:style-name="Sect1" text:name="Section73">
          <text:p text:style-name="Preformatted_20_Text"><text:bookmark text:name="code-block-viewer72"/><text:span text:style-name="Source_20_Text">✔ install node modules</text:span></text:p>
          <text:p text:style-name="Preformatted_20_Text"><text:span text:style-name="Source_20_Text">✔ build frontend</text:span></text:p>
          <text:p text:style-name="Preformatted_20_Text"><text:span text:style-name="Source_20_Text">✔ expose frontend port</text:span></text:p>
          <text:p text:style-name="P3"><text:span text:style-name="Source_20_Text">✔ start React app</text:span></text:p>
        </text:section>
        <text:p text:style-name="Horizontal_20_Line"/>
        <text:h text:style-name="Heading_20_1" text:outline-level="1">BACKEND DOCKERFILE</text:h>
        <text:p text:style-name="Text_20_body">Created FastAPI container.</text:p>
        <text:p text:style-name="Text_20_body">Responsibilities:</text:p>
        <text:section text:style-name="Sect1" text:name="Section74">
          <text:p text:style-name="Preformatted_20_Text"><text:bookmark text:name="code-block-viewer73"/><text:span text:style-name="Source_20_Text">✔ install Python dependencies</text:span></text:p>
          <text:p text:style-name="Preformatted_20_Text"><text:span text:style-name="Source_20_Text">✔ expose API port</text:span></text:p>
          <text:p text:style-name="P3"><text:span text:style-name="Source_20_Text">✔ start Uvicorn server</text:span></text:p>
        </text:section>
        <text:p text:style-name="Horizontal_20_Line"/>
        <text:h text:style-name="Heading_20_1" text:outline-level="1"><text:soft-page-break/>DOCKER COMPOSE ARCHITECTURE</text:h>
        <text:p text:style-name="Text_20_body">Implemented:</text:p>
        <text:section text:style-name="Sect1" text:name="Section75">
          <text:p text:style-name="Preformatted_20_Text"><text:bookmark text:name="code-block-viewer74"/><text:span text:style-name="Source_20_Text">services:</text:span></text:p>
          <text:p text:style-name="Preformatted_20_Text"><text:span text:style-name="Source_20_Text"><text:s text:c="2"/>frontend</text:span></text:p>
          <text:p text:style-name="Preformatted_20_Text"><text:span text:style-name="Source_20_Text"><text:s text:c="2"/>backend</text:span></text:p>
          <text:p text:style-name="P3"><text:span text:style-name="Source_20_Text"><text:s text:c="2"/>db</text:span></text:p>
        </text:section>
        <text:p text:style-name="Text_20_body">This:</text:p>
        <text:section text:style-name="Sect1" text:name="Section76">
          <text:p text:style-name="P3"><text:bookmark text:name="code-block-viewer75"/><text:span text:style-name="Source_20_Text">automatically manages:</text:span></text:p>
        </text:section>
        <text:section text:style-name="Sect1" text:name="Section77">
          <text:p text:style-name="Preformatted_20_Text"><text:bookmark text:name="code-block-viewer76"/><text:span text:style-name="Source_20_Text">✔ networking</text:span></text:p>
          <text:p text:style-name="Preformatted_20_Text"><text:span text:style-name="Source_20_Text">✔ startup order</text:span></text:p>
          <text:p text:style-name="Preformatted_20_Text"><text:span text:style-name="Source_20_Text">✔ service communication</text:span></text:p>
          <text:p text:style-name="Preformatted_20_Text"><text:span text:style-name="Source_20_Text">✔ container orchestration</text:span></text:p>
          <text:p text:style-name="P3"><text:span text:style-name="Source_20_Text">✔ persistent volumes</text:span></text:p>
        </text:section>
        <text:p text:style-name="Horizontal_20_Line"/>
        <text:h text:style-name="Heading_20_1" text:outline-level="1">MOST IMPORTANT DEVOPS CONCEPT LEARNED</text:h>
        <text:h text:style-name="Heading_20_1" text:outline-level="1">Container Networking</text:h>
        <text:p text:style-name="Text_20_body">This is HUGE.</text:p>
        <text:p text:style-name="Horizontal_20_Line"/>
        <text:h text:style-name="Heading_20_1" text:outline-level="1">BEFORE DOCKER</text:h>
        <text:section text:style-name="Sect1" text:name="Section78">
          <text:p text:style-name="P3"><text:bookmark text:name="code-block-viewer77"/><text:span text:style-name="Source_20_Text">localhost</text:span></text:p>
        </text:section>
        <text:p text:style-name="Text_20_body">meant:</text:p>
        <text:h text:style-name="Heading_20_1" text:outline-level="1">your laptop.</text:h>
        <text:p text:style-name="Horizontal_20_Line"/>
        <text:h text:style-name="Heading_20_1" text:outline-level="1">AFTER DOCKER</text:h>
        <text:p text:style-name="Text_20_body">Each container becomes:</text:p>
        <text:h text:style-name="Heading_20_1" text:outline-level="1">separate mini-machine.</text:h>
        <text:p text:style-name="Text_20_body">So:</text:p>
        <text:section text:style-name="Sect1" text:name="Section79">
          <text:p text:style-name="P3"><text:bookmark text:name="code-block-viewer78"/><text:span text:style-name="Source_20_Text">localhost</text:span></text:p>
        </text:section>
        <text:p text:style-name="Text_20_body"><text:soft-page-break/>inside backend container means:</text:p>
        <text:h text:style-name="Heading_20_1" text:outline-level="1">backend container itself.</text:h>
        <text:p text:style-name="Text_20_body">NOT PostgreSQL container.</text:p>
        <text:p text:style-name="Horizontal_20_Line"/>
        <text:h text:style-name="Heading_20_1" text:outline-level="1">SOLUTION</text:h>
        <text:p text:style-name="Text_20_body">Containers communicate using:</text:p>
        <text:h text:style-name="Heading_20_1" text:outline-level="1">service names.</text:h>
        <text:p text:style-name="Text_20_body">Example:</text:p>
        <text:section text:style-name="Sect1" text:name="Section80">
          <text:p text:style-name="P3"><text:bookmark text:name="code-block-viewer79"/><text:span text:style-name="Source_20_Text">db:</text:span></text:p>
        </text:section>
        <text:p text:style-name="Text_20_body">becomes hostname:</text:p>
        <text:section text:style-name="Sect1" text:name="Section81">
          <text:p text:style-name="P3"><text:bookmark text:name="code-block-viewer80"/><text:span text:style-name="Source_20_Text">db</text:span></text:p>
        </text:section>
        <text:p text:style-name="Text_20_body">So database connection becomes:</text:p>
        <text:section text:style-name="Sect1" text:name="Section82">
          <text:p text:style-name="P3"><text:bookmark text:name="code-block-viewer81"/><text:span text:style-name="Source_20_Text">DATABASE_URL=postgresql://user:password@db:5432/kavachops</text:span></text:p>
        </text:section>
        <text:p text:style-name="Text_20_body">This is:</text:p>
        <text:h text:style-name="Heading_20_1" text:outline-level="1">foundational Kubernetes/cloud-native concept.</text:h>
        <text:p text:style-name="Horizontal_20_Line"/>
        <text:h text:style-name="Heading_20_1" text:outline-level="1">ENVIRONMENT CONFIGURATION</text:h>
        <text:p text:style-name="Text_20_body">Implemented:</text:p>
        <text:section text:style-name="Sect1" text:name="Section83">
          <text:p text:style-name="Preformatted_20_Text"><text:bookmark text:name="code-block-viewer82"/><text:span text:style-name="Source_20_Text">✔ DATABASE_URL</text:span></text:p>
          <text:p text:style-name="Preformatted_20_Text"><text:span text:style-name="Source_20_Text">✔ JWT_SECRET</text:span></text:p>
          <text:p text:style-name="Preformatted_20_Text"><text:span text:style-name="Source_20_Text">✔ Redis configs</text:span></text:p>
          <text:p text:style-name="P3"><text:span text:style-name="Source_20_Text">✔ service-based networking</text:span></text:p>
        </text:section>
        <text:p text:style-name="Horizontal_20_Line"/>
        <text:h text:style-name="Heading_20_1" text:outline-level="1">DOCKER VOLUMES</text:h>
        <text:p text:style-name="Text_20_body">Implemented:</text:p>
        <text:h text:style-name="Heading_20_1" text:outline-level="1"><text:soft-page-break/>persistent PostgreSQL storage.</text:h>
        <text:p text:style-name="Text_20_body">Without volumes:</text:p>
        <text:section text:style-name="Sect1" text:name="Section84">
          <text:p text:style-name="P3"><text:bookmark text:name="code-block-viewer83"/><text:span text:style-name="Source_20_Text">container restart = DB wipe</text:span></text:p>
        </text:section>
        <text:p text:style-name="Text_20_body">With volumes:</text:p>
        <text:section text:style-name="Sect1" text:name="Section85">
          <text:p text:style-name="P3"><text:bookmark text:name="code-block-viewer84"/><text:span text:style-name="Source_20_Text">data persists</text:span></text:p>
        </text:section>
        <text:p text:style-name="Text_20_body">Enterprise critical feature.</text:p>
        <text:p text:style-name="Horizontal_20_Line"/>
        <text:h text:style-name="Heading_20_1" text:outline-level="1">REAL DEVOPS CONCEPTS LEARNED</text:h>
        <text:section text:style-name="Sect1" text:name="Section86">
          <text:p text:style-name="Preformatted_20_Text"><text:bookmark text:name="code-block-viewer85"/><text:span text:style-name="Source_20_Text">✔ containerization</text:span></text:p>
          <text:p text:style-name="Preformatted_20_Text"><text:span text:style-name="Source_20_Text">✔ service orchestration</text:span></text:p>
          <text:p text:style-name="Preformatted_20_Text"><text:span text:style-name="Source_20_Text">✔ Docker networking</text:span></text:p>
          <text:p text:style-name="Preformatted_20_Text"><text:span text:style-name="Source_20_Text">✔ infrastructure isolation</text:span></text:p>
          <text:p text:style-name="Preformatted_20_Text"><text:span text:style-name="Source_20_Text">✔ environment management</text:span></text:p>
          <text:p text:style-name="Preformatted_20_Text"><text:span text:style-name="Source_20_Text">✔ persistent storage</text:span></text:p>
          <text:p text:style-name="P3"><text:span text:style-name="Source_20_Text">✔ cloud-native architecture</text:span></text:p>
        </text:section>
        <text:p text:style-name="Horizontal_20_Line"/>
        <text:h text:style-name="Heading_20_1" text:outline-level="1">FINAL OUTCOME OF PHASE 3</text:h>
        <text:p text:style-name="Text_20_body">KavachOps is now:</text:p>
        <text:section text:style-name="Sect1" text:name="Section87">
          <text:p text:style-name="Preformatted_20_Text"><text:bookmark text:name="code-block-viewer86"/><text:span text:style-name="Source_20_Text">✔ Full-stack</text:span></text:p>
          <text:p text:style-name="Preformatted_20_Text"><text:span text:style-name="Source_20_Text">✔ Authenticated</text:span></text:p>
          <text:p text:style-name="Preformatted_20_Text"><text:span text:style-name="Source_20_Text">✔ Database-driven</text:span></text:p>
          <text:p text:style-name="Preformatted_20_Text"><text:span text:style-name="Source_20_Text">✔ Dockerized</text:span></text:p>
          <text:p text:style-name="Preformatted_20_Text"><text:span text:style-name="Source_20_Text">✔ Enterprise UI</text:span></text:p>
          <text:p text:style-name="Preformatted_20_Text"><text:span text:style-name="Source_20_Text">✔ Multi-container</text:span></text:p>
          <text:p text:style-name="Preformatted_20_Text"><text:span text:style-name="Source_20_Text">✔ Cloud-native ready</text:span></text:p>
          <text:p text:style-name="P3"><text:span text:style-name="Source_20_Text">✔ DevOps-ready</text:span></text:p>
        </text:section>
        <text:p text:style-name="Horizontal_20_Line"/>
        <text:h text:style-name="Heading_20_1" text:outline-level="1">MOST IMPORTANT THING</text:h>
        <text:p text:style-name="Text_20_body">You are NO LONGER building:</text:p>
        <text:section text:style-name="Sect1" text:name="Section88">
          <text:p text:style-name="P3"><text:bookmark text:name="code-block-viewer87"/><text:span text:style-name="Source_20_Text">normal CRUD project</text:span></text:p>
        </text:section>
        <text:p text:style-name="Text_20_body">You are now building:</text:p>
        <text:h text:style-name="Heading_20_1" text:outline-level="1">enterprise security platform.</text:h>
        <text:p text:style-name="Horizontal_20_Line"/>
        <text:h text:style-name="Heading_20_1" text:outline-level="1"><text:soft-page-break/>NEXT PHASE</text:h>
        <text:h text:style-name="Heading_20_1" text:outline-level="1">PHASE 4 — DEVSECOPS PIPELINE</text:h>
        <text:p text:style-name="Text_20_body">This is where:</text:p>
        <text:h text:style-name="Heading_20_1" text:outline-level="1">REAL SECURITY AUTOMATION begins.</text:h>
        <text:p text:style-name="Text_20_body">Upcoming:</text:p>
        <text:section text:style-name="Sect1" text:name="Section89">
          <text:p text:style-name="Preformatted_20_Text"><text:bookmark text:name="code-block-viewer88"/><text:span text:style-name="Source_20_Text">✔ Jenkins</text:span></text:p>
          <text:p text:style-name="Preformatted_20_Text"><text:span text:style-name="Source_20_Text">✔ CI/CD</text:span></text:p>
          <text:p text:style-name="Preformatted_20_Text"><text:span text:style-name="Source_20_Text">✔ Trivy</text:span></text:p>
          <text:p text:style-name="Preformatted_20_Text"><text:span text:style-name="Source_20_Text">✔ automated scanning</text:span></text:p>
          <text:p text:style-name="Preformatted_20_Text"><text:span text:style-name="Source_20_Text">✔ pipeline security</text:span></text:p>
          <text:p text:style-name="Preformatted_20_Text"><text:span text:style-name="Source_20_Text">✔ container scanning</text:span></text:p>
          <text:p text:style-name="P3"><text:span text:style-name="Source_20_Text">✔ DevSecOps automation</text:span></text:p>
        </text:section>
        <text:p text:style-name="Text_20_body">This is where KavachOps starts becoming:<text:bookmark text:name="upload-files"/></text:p>
      </text:section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19:18:24.504765728</meta:creation-date>
    <dc:date>2026-05-26T00:40:26.920367512</dc:date>
    <meta:editing-duration>PT1M49S</meta:editing-duration>
    <meta:editing-cycles>2</meta:editing-cycles>
    <meta:generator>LibreOffice/7.3.7.2$Linux_X86_64 LibreOffice_project/30$Build-2</meta:generator>
    <meta:document-statistic meta:table-count="7" meta:image-count="0" meta:object-count="0" meta:page-count="30" meta:paragraph-count="763" meta:word-count="1972" meta:character-count="13966" meta:non-whitespace-character-count="12558"/>
  </office:meta>
</office:document-meta>
</file>